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svg+xml" manifest:full-path="Pictures/1.sv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paragraph-properties fo:margin-top="0in" fo:margin-bottom="0in"/>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list-style-name="L3">
    </style:style>
    <style:style style:name="P15" style:family="paragraph" style:parent-style-name="Text_20_body" style:list-style-name="L4">
    </style:style>
    <style:style style:name="P16" style:family="paragraph" style:parent-style-name="Text_20_body" style:list-style-name="L5">
      <style:paragraph-properties fo:margin-top="0in" fo:margin-bottom="0in"/>
    </style:style>
    <style:style style:name="P17" style:family="paragraph" style:parent-style-name="Text_20_body" style:list-style-name="L6">
      <style:paragraph-properties fo:margin-top="0in" fo:margin-bottom="0in"/>
    </style:style>
    <style:style style:name="P18" style:family="paragraph" style:parent-style-name="Text_20_body" style:list-style-name="L7">
      <style:paragraph-properties fo:margin-top="0in" fo:margin-bottom="0in"/>
    </style:style>
    <style:style style:name="P19" style:family="paragraph" style:parent-style-name="Text_20_body" style:list-style-name="L8">
      <style:paragraph-properties fo:margin-top="0in" fo:margin-bottom="0in"/>
    </style:style>
    <style:style style:name="P20" style:family="paragraph" style:parent-style-name="Text_20_body" style:list-style-name="L9">
      <style:paragraph-properties fo:margin-top="0in" fo:margin-bottom="0in"/>
    </style:style>
    <style:style style:name="P21" style:family="paragraph" style:parent-style-name="Text_20_body" style:list-style-name="L10">
    </style:style>
    <style:style style:name="P22" style:family="paragraph" style:parent-style-name="Text_20_body" style:list-style-name="L11">
      <style:paragraph-properties fo:margin-top="0in" fo:margin-bottom="0in"/>
    </style:style>
    <style:style style:name="P23" style:family="paragraph" style:parent-style-name="Text_20_body" style:list-style-name="L12">
      <style:paragraph-properties fo:margin-top="0in" fo:margin-bottom="0in"/>
    </style:style>
    <style:style style:name="P24" style:family="paragraph" style:parent-style-name="Text_20_body" style:list-style-name="L13">
      <style:paragraph-properties fo:margin-top="0in" fo:margin-bottom="0in"/>
    </style:style>
    <style:style style:name="P25" style:family="paragraph" style:parent-style-name="Text_20_body" style:list-style-name="L14">
      <style:paragraph-properties fo:margin-top="0in" fo:margin-bottom="0in"/>
    </style:style>
    <style:style style:name="P26" style:family="paragraph" style:parent-style-name="Text_20_body" style:list-style-name="L15">
      <style:paragraph-properties fo:margin-top="0in" fo:margin-bottom="0in"/>
    </style:style>
    <style:style style:name="P27" style:family="paragraph" style:parent-style-name="Text_20_body" style:list-style-name="L1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Quotations">
      <style:paragraph-properties fo:margin-left="0.5in" fo:margin-right="0in" fo:text-indent="0in" style:auto-text-indent="false"/>
    </style:style>
    <style:style style:name="P69" style:family="paragraph" style:parent-style-name="Text_20_body" style:list-style-name="L19">
    </style:style>
    <style:style style:name="P70" style:family="paragraph" style:parent-style-name="Text_20_body" style:list-style-name="L20">
      <style:paragraph-properties fo:margin-top="0in" fo:margin-bottom="0in"/>
    </style:style>
    <style:style style:name="P71" style:family="paragraph" style:parent-style-name="Text_20_body" style:list-style-name="L21">
      <style:paragraph-properties fo:margin-top="0in" fo:margin-bottom="0in"/>
    </style:style>
    <style:style style:name="P72" style:family="paragraph" style:parent-style-name="Text_20_body" style:list-style-name="L22">
    </style:style>
    <style:style style:name="P73" style:family="paragraph" style:parent-style-name="Text_20_body" style:list-style-name="L23">
      <style:paragraph-properties fo:margin-top="0in" fo:margin-bottom="0in"/>
    </style:style>
    <style:style style:name="P74" style:family="paragraph" style:parent-style-name="Text_20_body" style:list-style-name="L24">
      <style:paragraph-properties fo:margin-top="0in" fo:margin-bottom="0in"/>
    </style:style>
    <style:style style:name="P75" style:family="paragraph" style:parent-style-name="Text_20_body" style:list-style-name="L25">
    </style:style>
    <style:style style:name="P76" style:family="paragraph" style:parent-style-name="Text_20_body" style:list-style-name="L26">
      <style:paragraph-properties fo:margin-top="0in" fo:margin-bottom="0in"/>
    </style:style>
    <style:style style:name="P77" style:family="paragraph" style:parent-style-name="Text_20_body" style:list-style-name="L27">
      <style:paragraph-properties fo:margin-top="0in" fo:margin-bottom="0in"/>
    </style:style>
    <style:style style:name="P78" style:family="paragraph" style:parent-style-name="Text_20_body" style:list-style-name="L28">
      <style:paragraph-properties fo:margin-top="0in" fo:margin-bottom="0in"/>
    </style:style>
    <style:style style:name="P79" style:family="paragraph" style:parent-style-name="Text_20_body" style:list-style-name="L29">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4.J"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office:automatic-styles>
  <office:body>
    <office:text>
      <text:h text:style-name="Heading_20_1" text:outline-level="1"><text:bookmark-start text:name="urbanagent-an-open-framework-for-llm-orchestrated-urban-spatial-analysis"/>UrbanAgent: An Open Framework for LLM-Orchestrated Urban Spatial Analysis<text:bookmark-end text:name="urbanagent-an-open-framework-for-llm-orchestrated-urban-spatial-analysis"/></text:h>
      <text:p text:style-name="P1"><text:span text:style-name="T1">Target Journal</text:span>: Computers, Environment and Urban Systems (CEUS) <text:span text:style-name="T1">Special Issue</text:span>: Open Urban Data Science <text:span text:style-name="T1">Draft Version</text:span>: v0.2 — 2026-03-07</text:p>
      <text:p text:style-name="Horizontal_20_Line"/>
      <text:h text:style-name="Heading_20_2" text:outline-level="2"><text:bookmark-start text:name="abstract"/>Abstract<text:bookmark-end text:name="abstract"/></text:h>
      <text:p text:style-name="First_20_paragraph">Urban data science increasingly relies on complex analytical workflows that integrate heterogeneous spatial data sources, diverse geospatial tools, and domain-specific reasoning. However, the steep learning curve of GIS software, the fragmented nature of urban data pipelines, and the difficulty of orchestrating multi-step spatial analyses remain significant barriers for researchers and practitioners. We present <text:span text:style-name="T1">UrbanAgent</text:span>, an open-source Python framework that leverages Large Language Models (LLMs) to orchestrate urban spatial analysis through a modular agent architecture. The current UrbanAgent implementation introduces a unified pipeline comprising five core components: (1) a multi-source perception module for processing OpenStreetMap, remote sensing, and street-view imagery data; (2) a dual-space spatial cognition model that constructs and aligns topological graphs with vector geometries; (3) a reasoning and decision engine that translates spatial understanding into actionable interventions; (4) a hierarchical spatio-temporal memory system for contextual continuity; and (5) an extensible MCP-facing tool layer backed by reusable connectors and semantic adapters. In addition to the original GIS-oriented workflow, the revised software now includes connector abstractions for external systems, a benchmark adapter for traffic-signal tasks, and a CityData-direct evaluation pipeline that separates reusable benchmark assets from simulator-coupled code. We validate UrbanAgent through three urban case studies and a verified quick benchmark across eight CityBench task types using two multimodal backends, Qwen and Kimi. In this benchmark, the enhanced agent configurations improve the average score from 0.245 to 0.538 for Qwen and from 0.244 to 0.550 for Kimi, with the largest gains appearing in mobility prediction, outdoor navigation, and urban exploration, while image-heavy tasks such as population prediction and object detection remain challenging. These results position UrbanAgent not as a closed benchmark-specific system but as an extensible orchestration framework for open urban data science and interoperable urban software workflows.</text:p>
      <text:p text:style-name="Text_20_body"><text:span text:style-name="T1">Keywords</text:span>: Urban data science; LLM agent; Spatial analysis; OpenStreetMap; Geospatial framework; Open-source software; Model Context Protocol</text:p>
      <text:p text:style-name="Horizontal_20_Line"/>
      <text:h text:style-name="Heading_20_2" text:outline-level="2"><text:bookmark-start text:name="id_1-introduction"/>1. Introduction<text:bookmark-end text:name="id_1-introduction"/></text:h>
      <text:p text:style-name="First_20_paragraph">Urban data science has witnessed rapid growth over the past decade, driven by the proliferation of open geospatial data sources—OpenStreetMap (OSM), satellite imagery, street-view photographs, mobility traces—and the maturation of computational tools for spatial analysis (Boeing, 2017; Biljecki et al., 2021). Open-source software packages such as OSMnx (Boeing, 2017), PySAL (Rey &amp; Anselin, 2007), and GeoPandas (Jordahl et al., 2020) have democratized access to urban network analysis, spatial statistics, and geographic data processing. These tools have enabled reproducible research workflows that were previously confined to proprietary GIS platforms.</text:p>
      <text:p text:style-name="Text_20_body">Despite these advances, conducting urban spatial analysis remains a technically demanding process. A typical analytical workflow—say, assessing pedestrian walkability in a neighborhood—requires researchers to: (i) acquire and parse multi-source geospatial data, (ii) construct road networks and compute topological metrics, (iii) identify spatial patterns through clustering and overlay analysis, (iv) interpret findings through domain-specific urban planning knowledge, and (v) generate visualizations and reports. Each step involves distinct tools, data formats, and programming interfaces. The cognitive overhead of managing such workflows creates barriers for interdisciplinary researchers and limits the scalability of urban analysis to new contexts and cities.</text:p>
      <text:p text:style-name="Text_20_body">Meanwhile, Large Language Models (LLMs) have demonstrated remarkable capabilities in tool use, multi-step reasoning, and code generation (OpenAI, 2023; Anthropic, 2024). LLM-based agent frameworks—such as AutoGPT, LangChain, and MetaGPT—have shown that language models can orchestrate complex computational workflows by decomposing tasks, invoking appropriate tools, and synthesizing results. In the geospatial domain, recent efforts like GeoGPT (Zhang et al., 2024), UrbanGPT (Li et al., 2024), and CityGPT (Feng et al., 2024) have explored applying LLMs to urban analysis tasks. However, these systems typically treat the LLM as a black-box predictor for specific tasks (e.g., traffic forecasting, POI recommendation) rather than as an <text:span text:style-name="T2">orchestrator</text:span> that actively reasons about urban spatial structure and invokes geospatial tools.</text:p>
      <text:p text:style-name="Text_20_body">Several critical gaps persist in the current landscape:</text:p>
      <text:list text:style-name="L1">
        <text:list-item>
          <text:p text:style-name="P2"><text:span text:style-name="T1">Lack of unified agent frameworks for urban spatial analysis.</text:span> Existing urban LLM systems are task-specific and lack a general-purpose architecture that integrates perception, cognition, reasoning, memory, and action for diverse urban analysis scenarios.</text:p>
        </text:list-item>
        <text:list-item>
          <text:p text:style-name="P2"><text:span text:style-name="T1">Insufficient spatial reasoning capabilities.</text:span> Most LLM-based systems treat spatial data as flat text or feature vectors, missing the topological and geometric structure that is fundamental to urban form. There is no established mechanism for LLMs to reason about spatial relationships (adjacency, connectivity, containment) alongside metric properties (distance, area, density).</text:p>
        </text:list-item>
        <text:list-item>
          <text:p text:style-name="P2"><text:span text:style-name="T1">Disconnected tool ecosystems.</text:span> Urban analysis involves numerous specialized tools (network analysis, density computation, accessibility measurement), but there is no standardized protocol for LLM agents to discover, invoke, and compose these tools into coherent analytical workflows.</text:p>
        </text:list-item>
        <text:list-item>
          <text:p text:style-name="P2"><text:span text:style-name="T1">Absence of memory and temporal continuity.</text:span> Urban analysis is inherently contextual—understanding a neighborhood requires accumulating knowledge across multiple observations and time periods. Existing systems lack memory mechanisms that preserve spatial and temporal context across analytical sessions.</text:p>
        </text:list-item>
      </text:list>
      <text:p text:style-name="First_20_paragraph">To address these gaps, we present <text:span text:style-name="T1">UrbanAgent</text:span>, an open-source Python framework for LLM-orchestrated urban spatial analysis. The core design philosophy of UrbanAgent is that the LLM should serve as an <text:span text:style-name="T2">intelligent orchestrator</text:span> that understands urban spatial structure and coordinates specialized geospatial tools, rather than replacing domain-specific computation with language model predictions.</text:p>
      <text:p text:style-name="Text_20_body">UrbanAgent makes the following contributions:</text:p>
      <text:list text:style-name="L2">
        <text:list-item>
          <text:p text:style-name="P3"><text:span text:style-name="T1">A modular agent architecture</text:span> that unifies multi-source perception, dual-space spatial cognition, reasoning, memory, and action into a coherent pipeline for urban analysis tasks.</text:p>
        </text:list-item>
        <text:list-item>
          <text:p text:style-name="P3"><text:span text:style-name="T1">A dual-space spatial cognition model</text:span> that simultaneously constructs topological graphs (capturing spatial relationships) and vector geometries (capturing metric properties), providing LLMs with structured spatial representations that support interpretable reasoning.</text:p>
        </text:list-item>
        <text:list-item>
          <text:p text:style-name="P3"><text:span text:style-name="T1">An extensible geospatial tool interface</text:span> based on the Model Context Protocol (MCP) that standardizes how LLM agents discover and invoke urban analysis tools, including connectivity analysis, accessibility measurement, density computation, walkability assessment, SVG/GeoJSON visualization, and connector-facing calls to interoperable external systems.</text:p>
        </text:list-item>
        <text:list-item>
          <text:p text:style-name="P3"><text:span text:style-name="T1">A connector-and-adapter software design</text:span> that separates general external-system interoperability from benchmark-specific protocol translation, including a Rhino.Compute / Grasshopper connector and a reusable traffic-signal adapter.</text:p>
        </text:list-item>
        <text:list-item>
          <text:p text:style-name="P3"><text:span text:style-name="T1">Current empirical validation</text:span> through three urban case studies and a verified CityData-direct quick benchmark across eight task types and two multimodal backends, demonstrating that structured agent orchestration can substantially improve several urban reasoning tasks while also revealing the failure modes that still require stronger perception and domain models.</text:p>
        </text:list-item>
        <text:list-item>
          <text:p text:style-name="P3"><text:span text:style-name="T1">An open-source release</text:span> with documented APIs, Jupyter notebook tutorials, and reproducible examples, contributing to the ecosystem of open urban data science software.</text:p>
        </text:list-item>
      </text:list>
      <text:p text:style-name="First_20_paragraph">The remainder of this paper is organized as follows. Section 2 reviews related work on urban data science software, geospatial agent systems, and LLM-based spatial reasoning. Section 3 presents the UrbanAgent framework architecture. Section 4 details the implementation and open data integration. Section 5 demonstrates the framework through three urban case studies. Section 6 presents benchmark evaluation results. Section 7 discusses implications and limitations, and Section 8 concludes.</text:p>
      <text:p text:style-name="Horizontal_20_Line"/>
      <text:h text:style-name="Heading_20_2" text:outline-level="2"><text:bookmark-start text:name="id_2-related-work"/>2. Related Work<text:bookmark-end text:name="id_2-related-work"/></text:h>
      <text:h text:style-name="Heading_20_3" text:outline-level="3"><text:bookmark-start text:name="id_21-open-source-urban-data-science-software"/>2.1 Open-Source Urban Data Science Software<text:bookmark-end text:name="id_21-open-source-urban-data-science-software"/></text:h>
      <text:p text:style-name="First_20_paragraph">The urban data science community has produced a rich ecosystem of open-source tools. <text:span text:style-name="T1">OSMnx</text:span> (Boeing, 2017) enables automated downloading and analysis of street network data from OpenStreetMap, supporting graph-theoretic analysis of urban form. <text:span text:style-name="T1">PySAL</text:span> (Rey &amp; Anselin, 2007) provides a comprehensive library for spatial statistics, including spatial autocorrelation, regionalization, and spatial regression. <text:span text:style-name="T1">Madina</text:span> (Biljecki et al., 2024) offers a framework for pedestrian accessibility analysis, while <text:span text:style-name="T1">greenR</text:span> supports urban greenery assessment from remote sensing data. <text:span text:style-name="T1">ZenSVI</text:span> (Ito et al., 2024) provides tools for street-view imagery analysis, including scene segmentation and urban perception scoring.</text:p>
      <text:p text:style-name="Text_20_body">These tools excel within their individual domains but operate independently—each has its own data formats, APIs, and analytical assumptions. Composing them into end-to-end workflows requires substantial integration effort and programming expertise. UrbanAgent addresses this by providing an LLM-orchestrated framework that can invoke and compose these tools through a unified protocol.</text:p>
      <text:h text:style-name="Heading_20_3" text:outline-level="3"><text:bookmark-start text:name="id_22-llm-based-geospatial-systems"/>2.2 LLM-Based Geospatial Systems<text:bookmark-end text:name="id_22-llm-based-geospatial-systems"/></text:h>
      <text:p text:style-name="First_20_paragraph">Recent work has applied LLMs to various geospatial tasks. <text:span text:style-name="T1">UrbanGPT</text:span> (Li et al., 2024) fine-tunes an LLM for urban spatio-temporal prediction, treating city regions as tokens to forecast traffic, crowd flow, and crime patterns. <text:span text:style-name="T1">CityGPT</text:span> (Feng et al., 2024) introduces a systematic framework for evaluating LLMs on urban tasks, with CityBench providing a benchmark of eight city-level task types. <text:span text:style-name="T1">GeoGPT</text:span> (Zhang et al., 2024) proposes an autonomous GIS agent that invokes geospatial tools through LLM reasoning.</text:p>
      <text:p text:style-name="Text_20_body">In the geospatial code generation space, <text:span text:style-name="T1">GeoCogent</text:span> (Jain et al., 2024) evaluates LLMs on geographic code synthesis, while <text:span text:style-name="T1">GeoJSON Agents</text:span> leverage structured schema understanding for spatial data manipulation. <text:span text:style-name="T1">ShapefileGPT</text:span> explores natural-language interfaces for geographic data querying.</text:p>
      <text:p text:style-name="Text_20_body">Multi-agent systems for urban analysis have also emerged. <text:span text:style-name="T1">AutoBEE</text:span> (Wang et al., 2024) employs multiple agents for building energy estimation. <text:span text:style-name="T1">CartoAgent</text:span> (Fu et al., 2024) applies LLM agents to cartographic styling. <text:span text:style-name="T1">OpenCity</text:span> (Li et al., 2024b) proposes an open platform for urban analysis powered by LLMs.</text:p>
      <text:p text:style-name="Text_20_body">However, these systems share common limitations: they typically focus on a single task type, lack reasoning about spatial <text:span text:style-name="T2">structure</text:span> (topology, adjacency, connectivity), and do not provide a general-purpose framework that researchers can extend for their own urban analysis needs.</text:p>
      <text:h text:style-name="Heading_20_3" text:outline-level="3"><text:bookmark-start text:name="id_23-spatial-cognition-and-scene-understanding"/>2.3 Spatial Cognition and Scene Understanding<text:bookmark-end text:name="id_23-spatial-cognition-and-scene-understanding"/></text:h>
      <text:p text:style-name="First_20_paragraph">Understanding urban space requires not just processing data but reasoning about spatial relationships. Research on <text:span text:style-name="T1">spatial scene graphs</text:span> (Krishna et al., 2017; Yang et al., 2018) has shown that representing spatial relationships explicitly as graphs enables more sophisticated spatial reasoning. <text:span text:style-name="T1">LLaVA-SpaceSGG</text:span> (Bai et al., 2024) extends vision-language models with spatial scene graph generation.</text:p>
      <text:p text:style-name="Text_20_body">In urban morphology, the dual nature of space—both topological (what is connected to what) and geometric (how far apart, what shape)—has been foundational since the work of Hillier and Hanson (1984) on space syntax. Our dual-space cognition model draws on this tradition, operationalizing it for LLM-based spatial reasoning.</text:p>
      <text:h text:style-name="Heading_20_3" text:outline-level="3"><text:bookmark-start text:name="id_24-agent-memory-systems"/>2.4 Agent Memory Systems<text:bookmark-end text:name="id_24-agent-memory-systems"/></text:h>
      <text:p text:style-name="First_20_paragraph">Effective agent systems require memory to maintain context across tasks. <text:span text:style-name="T1">TiMem</text:span> (Zhong et al., 2024) proposes a time-sensitive memory mechanism for LLM agents, organizing memories across temporal scales. UrbanAgent adopts a similar hierarchical approach, but extends it with spatial indexing to support location-aware memory retrieval—a capability critical for urban analysis where geographic context determines relevance.</text:p>
      <text:h text:style-name="Heading_20_3" text:outline-level="3"><text:bookmark-start text:name="id_25-research-gaps-and-positioning"/>2.5 Research Gaps and Positioning<text:bookmark-end text:name="id_25-research-gaps-and-positioning"/></text:h>
      <text:p text:style-name="First_20_paragraph">Table 1 summarizes the positioning of UrbanAgent relative to existing systems across five dimensions: whether the system is an open framework (vs. a closed model), whether it supports multi-source spatial data, whether it has structured spatial reasoning (vs. text-only), whether it includes agent memory, and whether it provides standardized tool interfaces.</text:p>
      <text:p text:style-name="Text_20_body"><text:span text:style-name="T1">Table 1.</text:span> Comparison of UrbanAgent with existing urban LLM syste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System</text:p>
            </table:table-cell>
            <table:table-cell table:style-name="TableHeaderRowCell" office:value-type="string">
              <text:p text:style-name="P4">Open Framework</text:p>
            </table:table-cell>
            <table:table-cell table:style-name="TableHeaderRowCell" office:value-type="string">
              <text:p text:style-name="P5">Multi-Source Data</text:p>
            </table:table-cell>
            <table:table-cell table:style-name="TableHeaderRowCell" office:value-type="string">
              <text:p text:style-name="P6">Spatial Structure Reasoning</text:p>
            </table:table-cell>
            <table:table-cell table:style-name="TableHeaderRowCell" office:value-type="string">
              <text:p text:style-name="P7">Agent Memory</text:p>
            </table:table-cell>
            <table:table-cell table:style-name="TableHeaderRowCell" office:value-type="string">
              <text:p text:style-name="P8">Standardized Tool Interface</text:p>
            </table:table-cell>
          </table:table-row>
        </table:table-header-rows>
        <table:table-row>
          <table:table-cell table:style-name="TableRowCell" office:value-type="string">
            <text:p text:style-name="Table_20_Contents">UrbanGPT (Li et al., 2024)</text:p>
          </table:table-cell>
          <table:table-cell table:style-name="TableRowCell" office:value-type="string">
            <text:p text:style-name="P9">✗</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cell table:style-name="TableRowCell" office:value-type="string">
            <text:p text:style-name="P13">✗</text:p>
          </table:table-cell>
        </table:table-row>
        <table:table-row>
          <table:table-cell table:style-name="TableRowCell" office:value-type="string">
            <text:p text:style-name="Table_20_Contents">CityGPT (Feng et al., 2024)</text:p>
          </table:table-cell>
          <table:table-cell table:style-name="TableRowCell" office:value-type="string">
            <text:p text:style-name="P9">△</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cell table:style-name="TableRowCell" office:value-type="string">
            <text:p text:style-name="P13">✗</text:p>
          </table:table-cell>
        </table:table-row>
        <table:table-row>
          <table:table-cell table:style-name="TableRowCell" office:value-type="string">
            <text:p text:style-name="Table_20_Contents">GeoGPT (Zhang et al., 2024)</text:p>
          </table:table-cell>
          <table:table-cell table:style-name="TableRowCell" office:value-type="string">
            <text:p text:style-name="P9">△</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cell table:style-name="TableRowCell" office:value-type="string">
            <text:p text:style-name="P13">△</text:p>
          </table:table-cell>
        </table:table-row>
        <table:table-row>
          <table:table-cell table:style-name="TableRowCell" office:value-type="string">
            <text:p text:style-name="Table_20_Contents">AutoBEE (Wang et al., 2024)</text:p>
          </table:table-cell>
          <table:table-cell table:style-name="TableRowCell" office:value-type="string">
            <text:p text:style-name="P9">✗</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cell table:style-name="TableRowCell" office:value-type="string">
            <text:p text:style-name="P13">✗</text:p>
          </table:table-cell>
        </table:table-row>
        <table:table-row>
          <table:table-cell table:style-name="TableRowCell" office:value-type="string">
            <text:p text:style-name="Table_20_Contents">OpenCity (Li et al., 2024b)</text:p>
          </table:table-cell>
          <table:table-cell table:style-name="TableRowCell" office:value-type="string">
            <text:p text:style-name="P9">△</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cell table:style-name="TableRowCell" office:value-type="string">
            <text:p text:style-name="P13">✗</text:p>
          </table:table-cell>
        </table:table-row>
        <table:table-row>
          <table:table-cell table:style-name="TableRowCell" office:value-type="string">
            <text:p text:style-name="Table_20_Contents"><text:span text:style-name="T1">UrbanAgent (Ours)</text:span></text:p>
          </table:table-cell>
          <table:table-cell table:style-name="TableRowCell" office:value-type="string">
            <text:p text:style-name="P9"><text:span text:style-name="T1">✓</text:span></text:p>
          </table:table-cell>
          <table:table-cell table:style-name="TableRowCell" office:value-type="string">
            <text:p text:style-name="P10"><text:span text:style-name="T1">✓</text:span></text:p>
          </table:table-cell>
          <table:table-cell table:style-name="TableRowCell" office:value-type="string">
            <text:p text:style-name="P11"><text:span text:style-name="T1">✓</text:span></text:p>
          </table:table-cell>
          <table:table-cell table:style-name="TableRowCell" office:value-type="string">
            <text:p text:style-name="P12"><text:span text:style-name="T1">✓</text:span></text:p>
          </table:table-cell>
          <table:table-cell table:style-name="TableRowCell" office:value-type="string">
            <text:p text:style-name="P13"><text:span text:style-name="T1">✓</text:span></text:p>
          </table:table-cell>
        </table:table-row>
      </table:table>
      <text:p text:style-name="First_20_paragraph"><text:span text:style-name="T2">✓ = fully supported, △ = partially supported, ✗ = not supported</text:span></text:p>
      <text:p text:style-name="Horizontal_20_Line"/>
      <text:h text:style-name="Heading_20_2" text:outline-level="2"><text:bookmark-start text:name="id_3-the-urbanagent-framework"/>3. The UrbanAgent Framework<text:bookmark-end text:name="id_3-the-urbanagent-framework"/></text:h>
      <text:h text:style-name="Heading_20_3" text:outline-level="3"><text:bookmark-start text:name="id_31-design-philosophy-and-overview"/>3.1 Design Philosophy and Overview<text:bookmark-end text:name="id_31-design-philosophy-and-overview"/></text:h>
      <text:p text:style-name="First_20_paragraph">UrbanAgent is designed around three core principles:</text:p>
      <text:list text:style-name="L3">
        <text:list-item>
          <text:p text:style-name="P14"><text:span text:style-name="T1">LLM as orchestrator, not predictor.</text:span> The LLM coordinates specialized geospatial tools and synthesizes their outputs, rather than attempting to predict urban phenomena directly from text.</text:p>
        </text:list-item>
        <text:list-item>
          <text:p text:style-name="P14"><text:span text:style-name="T1">Spatial structure as first-class representation.</text:span> Urban space is represented through dual topological-vector representations that capture both relational and metric properties, enabling the LLM to reason about spatial structure explicitly.</text:p>
        </text:list-item>
        <text:list-item>
          <text:p text:style-name="P14"><text:span text:style-name="T1">Openness and extensibility.</text:span> The framework is modular, with standardized interfaces for adding new data sources, analysis tools, LLM backends, and evaluation metrics.</text:p>
        </text:list-item>
      </text:list>
      <text:p text:style-name="First_20_paragraph">Figure 1 presents the overall architecture. UrbanAgent consists of five interconnected modules arranged in a perception-cognition-reasoning-action pipeline, augmented by a cross-cutting memory system and an extensible tool layer.</text:p>
      <text:p text:style-name="Text_20_body"><draw:frame draw:name="img1" svg:width="2242.0pt" svg:height="642.0pt"><draw:image xlink:href="Pictures/0.png" xlink:type="simple" xlink:show="embed" xlink:actuate="onLoad"/></draw:frame></text:p>
      <text:p text:style-name="Text_20_body"><text:span text:style-name="T1">Figure 1.</text:span> UrbanAgent system architecture. The revised framework centers on a Perception → Cognition → Reasoning → Action pipeline, with a cross-cutting memory layer and an MCP-facing execution layer backed by reusable connectors and semantic or benchmark adapters. The draw.io source file is archived as <text:span text:style-name="Source_Text">figures/urbanagent_framework_flow.drawio</text:span>.</text:p>
      <text:h text:style-name="Heading_20_3" text:outline-level="3"><text:bookmark-start text:name="id_32-multi-source-perception-module"/>3.2 Multi-Source Perception Module<text:bookmark-end text:name="id_32-multi-source-perception-module"/></text:h>
      <text:p text:style-name="First_20_paragraph">Urban analysis requires processing diverse data modalities, each capturing different aspects of the urban environment. The Perception Module provides a unified interface for ingesting and structuring seven data types:</text:p>
      <text:p text:style-name="Text_20_body"><text:span text:style-name="T1">OpenStreetMap (OSM) data.</text:span> The OSM processor uses <text:span text:style-name="Source_Text">osmnx</text:span> to acquire road network graphs and building footprints within a specified bounding box or radius around a location. Raw OSM data is parsed into structured features comprising: road segments (with highway type, name, lane count), building footprints (with area, height, function), and points of interest (with category, name, coordinates). Road network topology is extracted as a NetworkX graph preserving intersection connectivity.</text:p>
      <text:p text:style-name="Text_20_body"><text:span text:style-name="T1">Remote sensing imagery.</text:span> Satellite and aerial images are processed through a VLM (Vision-Language Model) integration that extracts land-use descriptions, density estimates, and feature classifications. The module supports both raw raster inputs (via <text:span text:style-name="Source_Text">rasterio</text:span>) and pre-processed image files, transforming visual information into structured attributes (land_use categories, density levels, detected features).</text:p>
      <text:p text:style-name="Text_20_body"><text:span text:style-name="T1">Street-view imagery.</text:span> Panoramic street-level photographs are analyzed through VLM-based scene understanding, generating six-dimensional perceptual scores (aesthetics, safety, vitality, walkability, greenery, enclosure) and spatial scene graphs describing element relationships. This enables ground-level perception of urban quality that complements the bird's-eye view from remote sensing.</text:p>
      <text:p text:style-name="Text_20_body"><text:span text:style-name="T1">Trajectory data.</text:span> Movement traces (GPS trajectories, check-in sequences) are processed to extract flow patterns, including origin-destination matrices, temporal distributions, and activity clustering. Trajectory features support mobility analysis and activity pattern recognition.</text:p>
      <text:p text:style-name="Text_20_body"><text:span text:style-name="T1">GeoJSON and Shapefile data.</text:span> Vector datasets in standard formats are loaded and parsed to extract geometric features, spatial bounds, and area statistics. This provides interoperability with the broader GIS ecosystem.</text:p>
      <text:p text:style-name="Text_20_body"><text:span text:style-name="T1">Text data.</text:span> Unstructured text descriptions (e.g., planning documents, observation notes) are processed through the LLM to extract spatial entities, locations, and urban attributes.</text:p>
      <text:p text:style-name="Text_20_body">The Perception Module produces a unified <text:span text:style-name="Source_Text">SpatialContext</text:span> data structure that encapsulates all extracted features regardless of data source, providing a consistent interface for downstream cognition. The <text:span text:style-name="Source_Text">SpatialContext</text:span> contains: raw spatial features (geometries, attributes), bounding box and coordinate reference system, and metadata about data provenance and quality.</text:p>
      <text:h text:style-name="Heading_20_3" text:outline-level="3"><text:bookmark-start text:name="id_33-dual-space-spatial-cognition-module"/>3.3 Dual-Space Spatial Cognition Module<text:bookmark-end text:name="id_33-dual-space-spatial-cognition-module"/></text:h>
      <text:p text:style-name="First_20_paragraph">The Spatial Cognition Module is the core intellectual contribution of UrbanAgent. It implements a <text:span text:style-name="T1">dual-space representation</text:span> that simultaneously models urban space in two complementary domains:</text:p>
      <text:list text:style-name="L4">
        <text:list-item>
          <text:p text:style-name="P15"><text:span text:style-name="T1">Topological space</text:span>: A graph-based representation capturing spatial relationships—adjacency, connectivity, containment, alignment, and separation—between urban elements. Topological space answers questions like "what is connected to what" and "what contains what."</text:p>
        </text:list-item>
        <text:list-item>
          <text:p text:style-name="P15"><text:span text:style-name="T1">Vector space</text:span>: A coordinate-based representation capturing metric properties—distances, areas, shapes, and orientations—of urban elements. Vector space answers questions like "how far" and "how large."</text:p>
        </text:list-item>
      </text:list>
      <text:p text:style-name="First_20_paragraph">This dual representation is inspired by the theory of space syntax (Hillier &amp; Hanson, 1984), which distinguishes between the relational and metric properties of spatial configurations, and by cognitive science research showing that human spatial reasoning operates on both topological and metric representations simultaneously (Tversky, 2003).</text:p>
      <text:h text:style-name="Heading_20_4" text:outline-level="4"><text:bookmark-start text:name="id_331-topological-graph-construction"/>3.3.1 Topological Graph Construction<text:bookmark-end text:name="id_331-topological-graph-construction"/></text:h>
      <text:p text:style-name="First_20_paragraph">The cognition module processes perceived features to construct a <text:span text:style-name="Source_Text">TopologicalGraph</text:span> containing five types of nodes:</text:p>
      <text:list text:style-name="L5">
        <text:list-item>
          <text:p text:style-name="P16"><text:span text:style-name="T1">Junction nodes</text:span>: Road intersections with degree ≥ 3, representing decision points in the movement network.</text:p>
        </text:list-item>
        <text:list-item>
          <text:p text:style-name="P16"><text:span text:style-name="T1">Plaza nodes</text:span>: Open spaces identified through building clustering analysis, representing gathering and activity spaces.</text:p>
        </text:list-item>
        <text:list-item>
          <text:p text:style-name="P16"><text:span text:style-name="T1">Cluster nodes</text:span>: Building clusters detected via DBSCAN (eps=50m, min_samples=3), representing urban functional areas.</text:p>
        </text:list-item>
        <text:list-item>
          <text:p text:style-name="P16"><text:span text:style-name="T1">Landmark nodes</text:span>: Notable structures identified by name, height, or area prominence.</text:p>
        </text:list-item>
        <text:list-item>
          <text:p text:style-name="P16"><text:span text:style-name="T1">Barrier nodes</text:span>: Linear or areal features (rivers, railways, highways) that impede movement.</text:p>
        </text:list-item>
      </text:list>
      <text:p text:style-name="First_20_paragraph">Five types of topological relations connect these nodes:</text:p>
      <text:list text:style-name="L6">
        <text:list-item>
          <text:p text:style-name="P17"><text:span text:style-name="T1">Adjacent</text:span>: Nodes within 100m direct distance.</text:p>
        </text:list-item>
        <text:list-item>
          <text:p text:style-name="P17"><text:span text:style-name="T1">Connected</text:span>: Nodes within 300m with path connectivity through the road network.</text:p>
        </text:list-item>
        <text:list-item>
          <text:p text:style-name="P17"><text:span text:style-name="T1">Contains</text:span>: Spatial containment relationships (e.g., a plaza within a building cluster).</text:p>
        </text:list-item>
        <text:list-item>
          <text:p text:style-name="P17"><text:span text:style-name="T1">Aligned</text:span>: Nodes sharing a linear morphological axis.</text:p>
        </text:list-item>
        <text:list-item>
          <text:p text:style-name="P17"><text:span text:style-name="T1">Separated</text:span>: Nodes divided by a barrier element.</text:p>
        </text:list-item>
      </text:list>
      <text:h text:style-name="Heading_20_4" text:outline-level="4"><text:bookmark-start text:name="id_332-topological-vector-alignment"/>3.3.2 Topological-Vector Alignment<text:bookmark-end text:name="id_332-topological-vector-alignment"/></text:h>
      <text:p text:style-name="First_20_paragraph">A key operation is the alignment between topological and vector representations. Each topological node is anchored to a vector coordinate (<text:span text:style-name="Source_Text">vector_anchor</text:span>), and each topological relation is mapped to a vector geometry (typically a <text:span text:style-name="Source_Text">LineString</text:span> connecting anchor points). This alignment enables:</text:p>
      <text:list text:style-name="L7">
        <text:list-item>
          <text:p text:style-name="P18"><text:span text:style-name="T1">Spatial measurement of topological properties</text:span>: Computing metric distances and areas for topologically-defined relationships (e.g., the actual walking distance between two "connected" nodes).</text:p>
        </text:list-item>
        <text:list-item>
          <text:p text:style-name="P18"><text:span text:style-name="T1">Topological interpretation of vector patterns</text:span>: Identifying that a set of closely-spaced buildings forms a topological "cluster" or that a road network exhibits a grid vs. organic topology.</text:p>
        </text:list-item>
      </text:list>
      <text:p text:style-name="First_20_paragraph">The alignment is computed by constructing a spatial index over node anchor points and mapping each topological relation to the shortest-path geometry in the road network.</text:p>
      <text:p text:style-name="Text_20_body">Figure 2 illustrates this dual-space mechanism. The key point is not merely that UrbanAgent stores both graphs and geometries, but that it keeps them explicitly aligned so that urban reasoning can move back and forth between relational and metric views of the same place.</text:p>
      <text:p text:style-name="Text_20_body"><draw:frame draw:name="img2" svg:width="750.0pt" svg:height="465.0pt"><draw:image xlink:href="Pictures/1.svg" xlink:type="simple" xlink:show="embed" xlink:actuate="onLoad"/></draw:frame></text:p>
      <text:p text:style-name="Text_20_body"><text:span text:style-name="T1">Figure 2.</text:span> Dual-space cognition in UrbanAgent. Vector geometry preserves metric properties such as distance and area, topological space preserves adjacency and barrier relations, and the alignment layer grounds the two through shared anchors and relation-specific spatial mappings.</text:p>
      <text:h text:style-name="Heading_20_4" text:outline-level="4"><text:bookmark-start text:name="id_333-semantic-annotation-and-pattern-recognition"/>3.3.3 Semantic Annotation and Pattern Recognition<text:bookmark-end text:name="id_333-semantic-annotation-and-pattern-recognition"/></text:h>
      <text:p text:style-name="First_20_paragraph">The constructed topological graph is enriched through two further processes:</text:p>
      <text:p text:style-name="Text_20_body"><text:span text:style-name="T1">Semantic annotation</text:span> assigns functional meaning to topological structures:</text:p>
      <text:list text:style-name="L8">
        <text:list-item>
          <text:p text:style-name="P19"><text:span text:style-name="T1">Functional zoning</text:span>: Density-based classification (density &gt; 0.7 → high-density residential; density &lt; 0.3 with open space → park/recreation).</text:p>
        </text:list-item>
        <text:list-item>
          <text:p text:style-name="P19"><text:span text:style-name="T1">Path structure</text:span>: Classification of routes by connectivity degree into primary, secondary, and tertiary paths.</text:p>
        </text:list-item>
        <text:list-item>
          <text:p text:style-name="P19"><text:span text:style-name="T1">Activity centers</text:span>: Identification of nodes with high degree centrality and mixed-use POI presence.</text:p>
        </text:list-item>
        <text:list-item>
          <text:p text:style-name="P19"><text:span text:style-name="T1">Spatial quality</text:span>: Assessment of permeability (route options between points) and legibility (landmark visibility, wayfinding clarity).</text:p>
        </text:list-item>
      </text:list>
      <text:p text:style-name="First_20_paragraph"><text:span text:style-name="T1">Pattern recognition</text:span> identifies higher-order urban morphological patterns:</text:p>
      <text:list text:style-name="L9">
        <text:list-item>
          <text:p text:style-name="P20"><text:span text:style-name="T1">Network structure</text:span>: Clustering coefficient, network density, and connected components via NetworkX graph analysis.</text:p>
        </text:list-item>
        <text:list-item>
          <text:p text:style-name="P20"><text:span text:style-name="T1">Hierarchy</text:span>: Stratification of network elements by connectivity degree into primary (top 20%), secondary (middle 30%), and tertiary (bottom 50%) levels.</text:p>
        </text:list-item>
        <text:list-item>
          <text:p text:style-name="P20"><text:span text:style-name="T1">Grain and orientation</text:span>: Analysis of building spacing regularity and street orientation distribution.</text:p>
        </text:list-item>
        <text:list-item>
          <text:p text:style-name="P20"><text:span text:style-name="T1">Urban fabric type</text:span>: Classification based on combined network and building cluster characteristics (grid, organic, radial, etc.).</text:p>
        </text:list-item>
      </text:list>
      <text:h text:style-name="Heading_20_3" text:outline-level="3"><text:bookmark-start text:name="id_34-reasoning-and-decision-module"/>3.4 Reasoning and Decision Module<text:bookmark-end text:name="id_34-reasoning-and-decision-module"/></text:h>
      <text:p text:style-name="First_20_paragraph">The Reasoning Module translates spatial cognition into analytical outcomes through task-specific reasoning strategies. UrbanAgent supports eight categories of urban analysis task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ask Type</text:p>
            </table:table-cell>
            <table:table-cell table:style-name="TableHeaderRowCell" office:value-type="string">
              <text:p text:style-name="Table_20_Heading">Reasoning Strategy</text:p>
            </table:table-cell>
            <table:table-cell table:style-name="TableHeaderRowCell" office:value-type="string">
              <text:p text:style-name="Table_20_Heading">Key Inputs</text:p>
            </table:table-cell>
            <table:table-cell table:style-name="TableHeaderRowCell" office:value-type="string">
              <text:p text:style-name="Table_20_Heading">Output</text:p>
            </table:table-cell>
          </table:table-row>
        </table:table-header-rows>
        <table:table-row>
          <table:table-cell table:style-name="TableRowCell" office:value-type="string">
            <text:p text:style-name="Table_20_Contents">Population estimation</text:p>
          </table:table-cell>
          <table:table-cell table:style-name="TableRowCell" office:value-type="string">
            <text:p text:style-name="Table_20_Contents">Density-based inference + LLM interpretation</text:p>
          </table:table-cell>
          <table:table-cell table:style-name="TableRowCell" office:value-type="string">
            <text:p text:style-name="Table_20_Contents">Land use, building density, area</text:p>
          </table:table-cell>
          <table:table-cell table:style-name="TableRowCell" office:value-type="string">
            <text:p text:style-name="Table_20_Contents">Numeric estimate</text:p>
          </table:table-cell>
        </table:table-row>
        <table:table-row>
          <table:table-cell table:style-name="TableRowCell" office:value-type="string">
            <text:p text:style-name="Table_20_Contents">Object detection</text:p>
          </table:table-cell>
          <table:table-cell table:style-name="TableRowCell" office:value-type="string">
            <text:p text:style-name="Table_20_Contents">VLM feature extraction + keyword matching</text:p>
          </table:table-cell>
          <table:table-cell table:style-name="TableRowCell" office:value-type="string">
            <text:p text:style-name="Table_20_Contents">Remote sensing / street view images</text:p>
          </table:table-cell>
          <table:table-cell table:style-name="TableRowCell" office:value-type="string">
            <text:p text:style-name="Table_20_Contents">Object list</text:p>
          </table:table-cell>
        </table:table-row>
        <table:table-row>
          <table:table-cell table:style-name="TableRowCell" office:value-type="string">
            <text:p text:style-name="Table_20_Contents">Geolocation</text:p>
          </table:table-cell>
          <table:table-cell table:style-name="TableRowCell" office:value-type="string">
            <text:p text:style-name="Table_20_Contents">Landmark matching + spatial cues</text:p>
          </table:table-cell>
          <table:table-cell table:style-name="TableRowCell" office:value-type="string">
            <text:p text:style-name="Table_20_Contents">Scene images, text descriptions</text:p>
          </table:table-cell>
          <table:table-cell table:style-name="TableRowCell" office:value-type="string">
            <text:p text:style-name="Table_20_Contents">City / coordinate</text:p>
          </table:table-cell>
        </table:table-row>
        <table:table-row>
          <table:table-cell table:style-name="TableRowCell" office:value-type="string">
            <text:p text:style-name="Table_20_Contents">Geographic Q&amp;A</text:p>
          </table:table-cell>
          <table:table-cell table:style-name="TableRowCell" office:value-type="string">
            <text:p text:style-name="Table_20_Contents">Context-augmented LLM reasoning</text:p>
          </table:table-cell>
          <table:table-cell table:style-name="TableRowCell" office:value-type="string">
            <text:p text:style-name="Table_20_Contents">Spatial context, domain knowledge</text:p>
          </table:table-cell>
          <table:table-cell table:style-name="TableRowCell" office:value-type="string">
            <text:p text:style-name="Table_20_Contents">Natural language answer</text:p>
          </table:table-cell>
        </table:table-row>
        <table:table-row>
          <table:table-cell table:style-name="TableRowCell" office:value-type="string">
            <text:p text:style-name="Table_20_Contents">Mobility prediction</text:p>
          </table:table-cell>
          <table:table-cell table:style-name="TableRowCell" office:value-type="string">
            <text:p text:style-name="Table_20_Contents">Trajectory pattern analysis</text:p>
          </table:table-cell>
          <table:table-cell table:style-name="TableRowCell" office:value-type="string">
            <text:p text:style-name="Table_20_Contents">Historical traces, land use</text:p>
          </table:table-cell>
          <table:table-cell table:style-name="TableRowCell" office:value-type="string">
            <text:p text:style-name="Table_20_Contents">Next-location prediction</text:p>
          </table:table-cell>
        </table:table-row>
        <table:table-row>
          <table:table-cell table:style-name="TableRowCell" office:value-type="string">
            <text:p text:style-name="Table_20_Contents">Traffic signal optimization</text:p>
          </table:table-cell>
          <table:table-cell table:style-name="TableRowCell" office:value-type="string">
            <text:p text:style-name="Table_20_Contents">Flow-based computation</text:p>
          </table:table-cell>
          <table:table-cell table:style-name="TableRowCell" office:value-type="string">
            <text:p text:style-name="Table_20_Contents">Road network structure, demand</text:p>
          </table:table-cell>
          <table:table-cell table:style-name="TableRowCell" office:value-type="string">
            <text:p text:style-name="Table_20_Contents">Signal timing</text:p>
          </table:table-cell>
        </table:table-row>
        <table:table-row>
          <table:table-cell table:style-name="TableRowCell" office:value-type="string">
            <text:p text:style-name="Table_20_Contents">Outdoor navigation</text:p>
          </table:table-cell>
          <table:table-cell table:style-name="TableRowCell" office:value-type="string">
            <text:p text:style-name="Table_20_Contents">Network-based pathfinding + LLM instruction</text:p>
          </table:table-cell>
          <table:table-cell table:style-name="TableRowCell" office:value-type="string">
            <text:p text:style-name="Table_20_Contents">Road graph, landmarks, destination</text:p>
          </table:table-cell>
          <table:table-cell table:style-name="TableRowCell" office:value-type="string">
            <text:p text:style-name="Table_20_Contents">Route instructions</text:p>
          </table:table-cell>
        </table:table-row>
        <table:table-row>
          <table:table-cell table:style-name="TableRowCell" office:value-type="string">
            <text:p text:style-name="Table_20_Contents">Urban exploration</text:p>
          </table:table-cell>
          <table:table-cell table:style-name="TableRowCell" office:value-type="string">
            <text:p text:style-name="Table_20_Contents">POI diversity optimization</text:p>
          </table:table-cell>
          <table:table-cell table:style-name="TableRowCell" office:value-type="string">
            <text:p text:style-name="Table_20_Contents">POI categories, spatial distribution</text:p>
          </table:table-cell>
          <table:table-cell table:style-name="TableRowCell" office:value-type="string">
            <text:p text:style-name="Table_20_Contents">Exploration plan</text:p>
          </table:table-cell>
        </table:table-row>
      </table:table>
      <text:p text:style-name="First_20_paragraph">The reasoning module maintains a knowledge graph of spatial relations and urban elements that provides background knowledge for inference. For tasks requiring quantitative analysis, it delegates to the Decision Module.</text:p>
      <text:p text:style-name="Text_20_body"><text:span text:style-name="T1">The Decision Module</text:span> implements a systematic design intervention workflow:</text:p>
      <text:list text:style-name="L10">
        <text:list-item>
          <text:p text:style-name="P21"><text:span text:style-name="T1">Opportunity identification</text:span>: Analyzes the spatial cognition output to detect three types of improvement opportunities:</text:p>
          <text:list text:style-name="L11">
            <text:list-item>
              <text:p text:style-name="P22"><text:span text:style-name="T2">Connectivity gaps</text:span>: Nodes with low connectivity degree or isolated components.</text:p>
            </text:list-item>
            <text:list-item>
              <text:p text:style-name="P22"><text:span text:style-name="T2">Open space deficits</text:span>: High-density areas lacking accessible public space.</text:p>
            </text:list-item>
            <text:list-item>
              <text:p text:style-name="P22"><text:span text:style-name="T2">Activity node potential</text:span>: High-centrality intersections underserving their connectivity potential.</text:p>
            </text:list-item>
          </text:list>
        </text:list-item>
        <text:list-item>
          <text:p text:style-name="P21"><text:span text:style-name="T1">Proposal generation</text:span>: Creates up to five <text:span text:style-name="Source_Text">InterventionProposal</text:span> objects, each specifying:</text:p>
          <text:list text:style-name="L12">
            <text:list-item>
              <text:p text:style-name="P23">Topological target (which graph element to modify)</text:p>
            </text:list-item>
            <text:list-item>
              <text:p text:style-name="P23">Vector geometry (<text:span text:style-name="Source_Text">LineString</text:span> for connections, <text:span text:style-name="Source_Text">Polygon</text:span> for spaces, <text:span text:style-name="Source_Text">Point.buffer</text:span> for nodes)</text:p>
            </text:list-item>
            <text:list-item>
              <text:p text:style-name="P23">Expected impact assessment</text:p>
            </text:list-item>
            <text:list-item>
              <text:p text:style-name="P23">Spatial measurements</text:p>
            </text:list-item>
          </text:list>
        </text:list-item>
        <text:list-item>
          <text:p text:style-name="P21"><text:span text:style-name="T1">Quantitative baseline and evaluation</text:span>: Four spatial measurement functions provide objective metrics:</text:p>
          <text:list text:style-name="L13">
            <text:list-item>
              <text:p text:style-name="P24"><text:span text:style-name="Source_Text">measure_connectivity()</text:span>: Global and local graph connectivity, maximum degree, isolated node count.</text:p>
            </text:list-item>
            <text:list-item>
              <text:p text:style-name="P24"><text:span text:style-name="Source_Text">measure_accessibility()</text:span>: Distance distribution from buildings to target facilities (mean, median, coverage radius).</text:p>
            </text:list-item>
            <text:list-item>
              <text:p text:style-name="P24"><text:span text:style-name="Source_Text">measure_density_distribution()</text:span>: Grid-based density analysis with hotspot detection and uniformity index.</text:p>
            </text:list-item>
            <text:list-item>
              <text:p text:style-name="P24"><text:span text:style-name="Source_Text">measure_walkability()</text:span>: Composite score from intersection density and POI density.</text:p>
            </text:list-item>
            <text:list-item>
              <text:p text:style-name="P24"><text:span text:style-name="Source_Text">measure_visual_integration()</text:span>: Visual exposure and enclosure assessment.</text:p>
            </text:list-item>
          </text:list>
        </text:list-item>
        <text:list-item>
          <text:p text:style-name="P21"><text:span text:style-name="T1">Selection</text:span>: Proposals are ranked by relevance to the analysis task and expected metric improvement, with the top three selected for implementation.</text:p>
        </text:list-item>
      </text:list>
      <text:h text:style-name="Heading_20_3" text:outline-level="3"><text:bookmark-start text:name="id_35-hierarchical-spatio-temporal-memory-module"/>3.5 Hierarchical Spatio-Temporal Memory Module<text:bookmark-end text:name="id_35-hierarchical-spatio-temporal-memory-module"/></text:h>
      <text:p text:style-name="First_20_paragraph">Urban analysis benefits from contextual continuity—knowledge accumulated from prior analyses of the same area or similar urban conditions. The Memory Module implements a three-tier architecture:</text:p>
      <text:p text:style-name="Text_20_body"><text:span text:style-name="T1">Working memory</text:span> stores the current analytical context as key-value pairs—active task parameters, intermediate results, and tool outputs. It is cleared between tasks.</text:p>
      <text:p text:style-name="Text_20_body"><text:span text:style-name="T1">Short-term memory</text:span> maintains a sliding window (capacity: 100 entries) of recent analytical experiences, supporting rapid retrieval through keyword-overlap matching (threshold: 30% term overlap). This enables the agent to reference recent findings during multi-step analyses.</text:p>
      <text:p text:style-name="Text_20_body"><text:span text:style-name="T1">Long-term memory</text:span> provides persistent storage with three specialized indices:</text:p>
      <text:list text:style-name="L14">
        <text:list-item>
          <text:p text:style-name="P25"><text:span text:style-name="T1">Spatial index</text:span>: Memories indexed by geographic bounding box, enabling retrieval of prior analyses for the same or nearby locations.</text:p>
        </text:list-item>
        <text:list-item>
          <text:p text:style-name="P25"><text:span text:style-name="T1">Temporal index</text:span>: Time-stamped memories supporting queries like "what was the traffic pattern here last week."</text:p>
        </text:list-item>
        <text:list-item>
          <text:p text:style-name="P25"><text:span text:style-name="T1">Semantic index</text:span>: Type-tagged memories enabling retrieval by urban concept (e.g., all prior walkability assessments).</text:p>
        </text:list-item>
      </text:list>
      <text:p text:style-name="First_20_paragraph">The memory retrieval process cascades from working memory (fastest, most relevant) through short-term (recent context) to long-term (historical knowledge), merging results across all three tiers.</text:p>
      <text:h text:style-name="Heading_20_3" text:outline-level="3"><text:bookmark-start text:name="id_36-mcp-based-geospatial-tool-interface"/>3.6 MCP-Based Geospatial Tool Interface<text:bookmark-end text:name="id_36-mcp-based-geospatial-tool-interface"/></text:h>
      <text:p text:style-name="First_20_paragraph">UrbanAgent employs the <text:span text:style-name="T1">Model Context Protocol (MCP)</text:span> to provide a standardized interface between the LLM reasoning layer and geospatial computation tools. In the revised software architecture, MCP is not the lowest integration layer; instead, it exposes capabilities implemented by a connector layer and a semantic adapter layer. Connectors are responsible for interoperating with external systems and widely used data ecosystems such as local GIS files, OpenStreetMap services, Web Feature/Map Services, databases, and parametric design platforms including Rhino.Compute / Grasshopper. Semantic adapters then translate connector outputs into urban-analysis-ready task objects. MCP defines a JSON-schema-based protocol where each tool specifies its name, description, parameter schema, and execution handler. This design offers several advantages:</text:p>
      <text:list text:style-name="L15">
        <text:list-item>
          <text:p text:style-name="P26"><text:span text:style-name="T1">Discoverability</text:span>: The LLM can query available tools and their capabilities at runtime.</text:p>
        </text:list-item>
        <text:list-item>
          <text:p text:style-name="P26"><text:span text:style-name="T1">Composability</text:span>: Tools can be invoked in sequences determined by the LLM's reasoning, enabling dynamic workflow construction.</text:p>
        </text:list-item>
        <text:list-item>
          <text:p text:style-name="P26"><text:span text:style-name="T1">Extensibility</text:span>: New tools can be registered through a single function call without modifying existing code.</text:p>
        </text:list-item>
      </text:list>
      <text:p text:style-name="First_20_paragraph">UrbanAgent ships with a core set of built-in MCP tools for geospatial analysis and an expanding set of connector-facing tools for interoperability:</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ool</text:p>
            </table:table-cell>
            <table:table-cell table:style-name="TableHeaderRowCell" office:value-type="string">
              <text:p text:style-name="Table_20_Heading">Description</text:p>
            </table:table-cell>
            <table:table-cell table:style-name="TableHeaderRowCell" office:value-type="string">
              <text:p text:style-name="Table_20_Heading">Key Parameters</text:p>
            </table:table-cell>
          </table:table-row>
        </table:table-header-rows>
        <table:table-row>
          <table:table-cell table:style-name="TableRowCell" office:value-type="string">
            <text:p text:style-name="Table_20_Contents"><text:span text:style-name="Source_Text">fetch_osm_data</text:span></text:p>
          </table:table-cell>
          <table:table-cell table:style-name="TableRowCell" office:value-type="string">
            <text:p text:style-name="Table_20_Contents">Acquire road/building/POI data from OSM</text:p>
          </table:table-cell>
          <table:table-cell table:style-name="TableRowCell" office:value-type="string">
            <text:p text:style-name="Table_20_Contents">location, radius, data_types</text:p>
          </table:table-cell>
        </table:table-row>
        <table:table-row>
          <table:table-cell table:style-name="TableRowCell" office:value-type="string">
            <text:p text:style-name="Table_20_Contents"><text:span text:style-name="Source_Text">analyze_connectivity</text:span></text:p>
          </table:table-cell>
          <table:table-cell table:style-name="TableRowCell" office:value-type="string">
            <text:p text:style-name="Table_20_Contents">Graph-theoretic network connectivity analysis</text:p>
          </table:table-cell>
          <table:table-cell table:style-name="TableRowCell" office:value-type="string">
            <text:p text:style-name="Table_20_Contents">road network GeoDataFrame</text:p>
          </table:table-cell>
        </table:table-row>
        <table:table-row>
          <table:table-cell table:style-name="TableRowCell" office:value-type="string">
            <text:p text:style-name="Table_20_Contents"><text:span text:style-name="Source_Text">measure_accessibility</text:span></text:p>
          </table:table-cell>
          <table:table-cell table:style-name="TableRowCell" office:value-type="string">
            <text:p text:style-name="Table_20_Contents">Distance-based accessibility measurement</text:p>
          </table:table-cell>
          <table:table-cell table:style-name="TableRowCell" office:value-type="string">
            <text:p text:style-name="Table_20_Contents">buildings, targets, threshold</text:p>
          </table:table-cell>
        </table:table-row>
        <table:table-row>
          <table:table-cell table:style-name="TableRowCell" office:value-type="string">
            <text:p text:style-name="Table_20_Contents"><text:span text:style-name="Source_Text">calculate_density</text:span></text:p>
          </table:table-cell>
          <table:table-cell table:style-name="TableRowCell" office:value-type="string">
            <text:p text:style-name="Table_20_Contents">Grid-based spatial density computation</text:p>
          </table:table-cell>
          <table:table-cell table:style-name="TableRowCell" office:value-type="string">
            <text:p text:style-name="Table_20_Contents">features, grid_size</text:p>
          </table:table-cell>
        </table:table-row>
        <table:table-row>
          <table:table-cell table:style-name="TableRowCell" office:value-type="string">
            <text:p text:style-name="Table_20_Contents"><text:span text:style-name="Source_Text">generate_svg_overlay</text:span></text:p>
          </table:table-cell>
          <table:table-cell table:style-name="TableRowCell" office:value-type="string">
            <text:p text:style-name="Table_20_Contents">Coordinate-accurate SVG map generation</text:p>
          </table:table-cell>
          <table:table-cell table:style-name="TableRowCell" office:value-type="string">
            <text:p text:style-name="Table_20_Contents">features, interventions, bbox</text:p>
          </table:table-cell>
        </table:table-row>
        <table:table-row>
          <table:table-cell table:style-name="TableRowCell" office:value-type="string">
            <text:p text:style-name="Table_20_Contents"><text:span text:style-name="Source_Text">export_geojson</text:span></text:p>
          </table:table-cell>
          <table:table-cell table:style-name="TableRowCell" office:value-type="string">
            <text:p text:style-name="Table_20_Contents">GeoJSON FeatureCollection export</text:p>
          </table:table-cell>
          <table:table-cell table:style-name="TableRowCell" office:value-type="string">
            <text:p text:style-name="Table_20_Contents">features, crs</text:p>
          </table:table-cell>
        </table:table-row>
        <table:table-row>
          <table:table-cell table:style-name="TableRowCell" office:value-type="string">
            <text:p text:style-name="Table_20_Contents"><text:span text:style-name="Source_Text">build_topology</text:span></text:p>
          </table:table-cell>
          <table:table-cell table:style-name="TableRowCell" office:value-type="string">
            <text:p text:style-name="Table_20_Contents">Topological graph construction from spatial features</text:p>
          </table:table-cell>
          <table:table-cell table:style-name="TableRowCell" office:value-type="string">
            <text:p text:style-name="Table_20_Contents">spatial context</text:p>
          </table:table-cell>
        </table:table-row>
        <table:table-row>
          <table:table-cell table:style-name="TableRowCell" office:value-type="string">
            <text:p text:style-name="Table_20_Contents"><text:span text:style-name="Source_Text">evaluate_grasshopper_definition</text:span></text:p>
          </table:table-cell>
          <table:table-cell table:style-name="TableRowCell" office:value-type="string">
            <text:p text:style-name="Table_20_Contents">Execute Rhino/Grasshopper parametric definitions via Rhino.Compute</text:p>
          </table:table-cell>
          <table:table-cell table:style-name="TableRowCell" office:value-type="string">
            <text:p text:style-name="Table_20_Contents">definition_path, input_values</text:p>
          </table:table-cell>
        </table:table-row>
        <table:table-row>
          <table:table-cell table:style-name="TableRowCell" office:value-type="string">
            <text:p text:style-name="Table_20_Contents"><text:span text:style-name="Source_Text">call_grasshopper_hops</text:span></text:p>
          </table:table-cell>
          <table:table-cell table:style-name="TableRowCell" office:value-type="string">
            <text:p text:style-name="Table_20_Contents">Invoke remote Grasshopper Hops workflows</text:p>
          </table:table-cell>
          <table:table-cell table:style-name="TableRowCell" office:value-type="string">
            <text:p text:style-name="Table_20_Contents">endpoint, input_values</text:p>
          </table:table-cell>
        </table:table-row>
        <table:table-row>
          <table:table-cell table:style-name="TableRowCell" office:value-type="string">
            <text:p text:style-name="Table_20_Contents"><text:span text:style-name="Source_Text">invoke_rhino_compute</text:span></text:p>
          </table:table-cell>
          <table:table-cell table:style-name="TableRowCell" office:value-type="string">
            <text:p text:style-name="Table_20_Contents">Call arbitrary Rhino.Compute geometry endpoints</text:p>
          </table:table-cell>
          <table:table-cell table:style-name="TableRowCell" office:value-type="string">
            <text:p text:style-name="Table_20_Contents">endpoint, arguments</text:p>
          </table:table-cell>
        </table:table-row>
      </table:table>
      <text:p text:style-name="First_20_paragraph">This distinction is important for urban software integration. Existing open urban data science tools such as OSMnx, GeoPandas, PySAL, Madina, and ZenSVI already provide mature computational primitives (Boeing, 2017; Jordahl et al., 2020; Rey &amp; Anselin, 2007; Biljecki et al., 2024; Ito et al., 2024). UrbanAgent is designed to orchestrate these tools and connect them to external design environments rather than replace them with monolithic agent logic. The same principle applies to Rhino/Grasshopper integration: UrbanAgent does not reimplement parametric modeling kernels, but exposes them through connectors so that LLM reasoning can coordinate GIS analysis, simulation, and parametric design within one workflow.</text:p>
      <text:p text:style-name="Text_20_body">Figure 3 complements the static architecture view by showing the runtime workflow. It highlights how a user query becomes a structured task payload, how MCP dispatch is inserted into the loop, and where connectors and adapters sit in actual execution.</text:p>
      <text:p text:style-name="Text_20_body"><draw:frame draw:name="img3" svg:width="810.0pt" svg:height="315.0pt"><draw:image xlink:href="Pictures/2.svg" xlink:type="simple" xlink:show="embed" xlink:actuate="onLoad"/></draw:frame></text:p>
      <text:p text:style-name="Text_20_body"><text:span text:style-name="T1">Figure 3.</text:span> Runtime execution workflow of UrbanAgent. The execution path proceeds from a user query to a structured task payload, then through perception, reasoning, and MCP-aligned action dispatch, while memory provides context and connectors or adapters expose both internal tools and interoperable external systems.</text:p>
      <text:h text:style-name="Heading_20_3" text:outline-level="3"><text:bookmark-start text:name="id_37-visualization-and-output-module"/>3.7 Visualization and Output Module<text:bookmark-end text:name="id_37-visualization-and-output-module"/></text:h>
      <text:p text:style-name="First_20_paragraph">UrbanAgent provides two visualization outputs that bridge analytical results and geographic context:</text:p>
      <text:p text:style-name="Text_20_body"><text:span text:style-name="T1">SVG overlay generation</text:span> produces scalable vector graphics where:</text:p>
      <text:list text:style-name="L16">
        <text:list-item>
          <text:p text:style-name="P27">Geographic coordinates are precisely mapped to SVG coordinates through affine transformation with Y-axis inversion.</text:p>
        </text:list-item>
        <text:list-item>
          <text:p text:style-name="P27">Three rendering layers are composited: base map (building footprints as filled polygons, road segments as styled paths), intervention overlay (color-coded by type: green for connectivity, blue for open space, orange for activity nodes), and legend layer.</text:p>
        </text:list-item>
        <text:list-item>
          <text:p text:style-name="P27">The output is a self-contained SVG document that can be embedded in reports or web applications.</text:p>
        </text:list-item>
      </text:list>
      <text:p text:style-name="First_20_paragraph"><text:span text:style-name="T1">GeoJSON export</text:span> produces standard FeatureCollection documents compatible with any GIS tool, web mapping library, or geographic database. Each intervention proposal is serialized as a Feature with geometry and properties (type, description, measurements, expected impact).</text:p>
      <text:p text:style-name="Text_20_body"><text:span text:style-name="T1">Measurement reports</text:span> are generated as structured documents combining quantitative metrics (connectivity indices, accessibility statistics, density distributions) with interpretive text, providing both machine-readable and human-readable outputs.</text:p>
      <text:p text:style-name="Horizontal_20_Line"/>
      <text:h text:style-name="Heading_20_2" text:outline-level="2"><text:bookmark-start text:name="id_4-implementation-and-open-data-integration"/>4. Implementation and Open Data Integration<text:bookmark-end text:name="id_4-implementation-and-open-data-integration"/></text:h>
      <text:h text:style-name="Heading_20_3" text:outline-level="3"><text:bookmark-start text:name="id_41-software-architecture"/>4.1 Software Architecture<text:bookmark-end text:name="id_41-software-architecture"/></text:h>
      <text:p text:style-name="First_20_paragraph">UrbanAgent is implemented in Python 3.9+ and follows a modular architecture with clear separation of concerns. The current codebase revision was motivated by two engineering goals: first, to reduce coupling between benchmark logic and the reusable software framework; second, to make external urban software systems accessible through the same agent-facing interface as native Python geospatial tools. The updated codebase organization therefore distinguishes general computation, external-system connectors, domain adapters, and benchmark adapters:</text:p>
      <text:p text:style-name="P28">urban_agent/</text:p>
      <text:p text:style-name="P29">├── __init__.py <text:s text:c="13"/># Package entry point</text:p>
      <text:p text:style-name="P30">├── core.py <text:s text:c="17"/># Main UrbanAgent orchestrator</text:p>
      <text:p text:style-name="P31">├── cognition.py <text:s text:c="12"/># Dual-space spatial cognition (585 lines)</text:p>
      <text:p text:style-name="P32">├── decision.py <text:s text:c="13"/># Spatial decision engine (521 lines)</text:p>
      <text:p text:style-name="P33">├── visualization.py <text:s text:c="8"/># SVG/GeoJSON visualization</text:p>
      <text:p text:style-name="P34">├── mcp_tools.py <text:s text:c="12"/># MCP tool registry and execution</text:p>
      <text:p text:style-name="P35">├── connectors/ <text:s text:c="13"/># External system connectors (Rhino.Compute, APIs, files)</text:p>
      <text:p text:style-name="P36">│ <text:s text:c="2"/>├── base.py <text:s text:c="13"/># Connector abstraction</text:p>
      <text:p text:style-name="P37">│ <text:s text:c="2"/>├── registry.py <text:s text:c="9"/># Connector registry</text:p>
      <text:p text:style-name="P38">│ <text:s text:c="2"/>└── rhino_connector.py <text:s text:c="2"/># Rhino.Compute and Grasshopper connector</text:p>
      <text:p text:style-name="P39">├── adapters/ <text:s text:c="15"/># Semantic and benchmark adapters</text:p>
      <text:p text:style-name="P40">│ <text:s text:c="2"/>└── traffic_signal_adapter.py # Simulator-to-agent traffic adapter</text:p>
      <text:p text:style-name="P41">├── perception/</text:p>
      <text:p text:style-name="P42">│ <text:s text:c="2"/>├── osm_processor.py <text:s text:c="4"/># OpenStreetMap data processing</text:p>
      <text:p text:style-name="P43">│ <text:s text:c="2"/>├── remote_sensing.py <text:s text:c="3"/># Satellite imagery processing</text:p>
      <text:p text:style-name="P44">│ <text:s text:c="2"/>└── street_view.py <text:s text:c="6"/># Street-view image analysis</text:p>
      <text:p text:style-name="P45">├── core/</text:p>
      <text:p text:style-name="P46">│ <text:s text:c="2"/>├── agent.py <text:s text:c="12"/># Async agent execution engine</text:p>
      <text:p text:style-name="P47">│ <text:s text:c="2"/>├── perception.py <text:s text:c="7"/># Multi-source perception router</text:p>
      <text:p text:style-name="P48">│ <text:s text:c="2"/>├── reasoning.py <text:s text:c="8"/># Task-specific reasoning strategies</text:p>
      <text:p text:style-name="P49">│ <text:s text:c="2"/>├── action.py <text:s text:c="11"/># Action execution with tool calling</text:p>
      <text:p text:style-name="P50">│ <text:s text:c="2"/>└── memory.py <text:s text:c="11"/># Hierarchical memory management</text:p>
      <text:p text:style-name="P51">├── llm/</text:p>
      <text:p text:style-name="P52">│ <text:s text:c="2"/>├── qwen_client.py <text:s text:c="6"/># Qwen (text + vision) client</text:p>
      <text:p text:style-name="P53">│ <text:s text:c="2"/>├── deepseek_client.py <text:s text:c="2"/># DeepSeek (chat + reasoner) client</text:p>
      <text:p text:style-name="P54">│ <text:s text:c="2"/>└── kimi_client.py <text:s text:c="6"/># Kimi (text + vision) client</text:p>
      <text:p text:style-name="P55">├── tools/</text:p>
      <text:p text:style-name="P56">│ <text:s text:c="2"/>└── geo_tools.py <text:s text:c="8"/># GeoDataLoader + SpatialAnalyzer</text:p>
      <text:p text:style-name="P57">└── evaluation/</text:p>
      <text:p text:style-name="P58"><text:s text:c="4"/>├── citybench_evaluator.py <text:s text:c="3"/># Evaluation framework v1</text:p>
      <text:p text:style-name="P59"><text:s text:c="4"/>└── citybench_evaluator_v2.py # Multi-dimensional evaluator</text:p>
      <text:p text:style-name="First_20_paragraph">The core dependencies are: <text:span text:style-name="Source_Text">osmnx</text:span> for OSM data acquisition and network analysis, <text:span text:style-name="Source_Text">networkx</text:span> for graph analysis, <text:span text:style-name="Source_Text">geopandas</text:span> and <text:span text:style-name="Source_Text">shapely</text:span> for geospatial data processing, <text:span text:style-name="Source_Text">scikit-learn</text:span> for spatial clustering (DBSCAN), and standard HTTP clients for LLM API communication. Optional dependencies include <text:span text:style-name="Source_Text">rasterio</text:span> for raster data, <text:span text:style-name="Source_Text">PIL</text:span> for image processing, and connector-side services such as Rhino.Compute for interoperable parametric geometry evaluation.</text:p>
      <text:p text:style-name="Text_20_body">Relative to the earlier draft, the software has been strengthened in four specific ways. First, task-type propagation was unified in the async execution path so that perception, reasoning, and action consistently receive the same structured task payload. Second, the reasoning module was extended from generic prompting to task-specific structured reasoning over CityData fields such as answer choices, mobility histories, traffic phase options, navigation steps, and exploration candidates. Third, the action layer was aligned around the MCP runtime so that both built-in geospatial functions and connector-facing capabilities are exposed through one invocation interface. Fourth, the benchmark pipeline was refactored into a CityData-direct quick evaluator, allowing data- and prompt-centric tasks to run without inheriting unnecessary benchmark runtime code, while retaining a benchmark adapter for tasks such as traffic signal control that remain coupled to simulator semantics.</text:p>
      <text:h text:style-name="Heading_20_3" text:outline-level="3"><text:bookmark-start text:name="id_42-llm-backend-support"/>4.2 LLM Backend Support<text:bookmark-end text:name="id_42-llm-backend-support"/></text:h>
      <text:p text:style-name="First_20_paragraph">UrbanAgent abstracts LLM communication through a unified client interface that supports multiple backends:</text:p>
      <text:list text:style-name="L17">
        <text:list-item>
          <text:p text:style-name="P60"><text:span text:style-name="T1">Qwen</text:span> (Alibaba): Supports both text and vision (VLM) modes via <text:span text:style-name="Source_Text">qwen-vl-plus</text:span> and <text:span text:style-name="Source_Text">qwen3-vl</text:span> models. Used for tasks requiring image understanding (remote sensing, street view).</text:p>
        </text:list-item>
        <text:list-item>
          <text:p text:style-name="P60"><text:span text:style-name="T1">DeepSeek</text:span>: Supports chat (<text:span text:style-name="Source_Text">deepseek-chat</text:span>) and deep reasoning (<text:span text:style-name="Source_Text">deepseek-reasoner</text:span>) modes. Text-only, offering analytical reasoning for non-vision tasks.</text:p>
        </text:list-item>
        <text:list-item>
          <text:p text:style-name="P60"><text:span text:style-name="T1">Kimi</text:span> (Moonshot): Supports text and vision via <text:span text:style-name="Source_Text">kimi-k2.5</text:span> model. Provides balanced text and image understanding.</text:p>
        </text:list-item>
      </text:list>
      <text:p text:style-name="First_20_paragraph">Each client handles API-specific authentication, request formatting, retry logic, and response parsing. The client interface exposes a single <text:span text:style-name="Source_Text">async generate(prompt, images=None)</text:span> method, allowing the agent core to be backend-agnostic. At the time of writing, both Qwen and Kimi have been exercised in the revised quick-benchmark pipeline and are included in the verified aggregate results reported below.</text:p>
      <text:h text:style-name="Heading_20_3" text:outline-level="3"><text:bookmark-start text:name="id_43-open-data-integration"/>4.3 Open Data Integration<text:bookmark-end text:name="id_43-open-data-integration"/></text:h>
      <text:p text:style-name="First_20_paragraph">UrbanAgent is designed to work exclusively with open data sources, ensuring reproducibility and accessibility:</text:p>
      <text:list text:style-name="L18">
        <text:list-item>
          <text:p text:style-name="P61"><text:span text:style-name="T1">OpenStreetMap</text:span>: The primary spatial data source, providing globally consistent road network, building footprint, land use, and POI data through the <text:span text:style-name="Source_Text">osmnx</text:span> interface.</text:p>
        </text:list-item>
        <text:list-item>
          <text:p text:style-name="P61"><text:span text:style-name="T1">Remote sensing datasets</text:span>: Compatible with open satellite imagery (e.g., Sentinel-2, Landsat) and benchmark datasets.</text:p>
        </text:list-item>
        <text:list-item>
          <text:p text:style-name="P61"><text:span text:style-name="T1">Street-view imagery</text:span>: Supports processing of publicly available panoramic imagery.</text:p>
        </text:list-item>
        <text:list-item>
          <text:p text:style-name="P61"><text:span text:style-name="T1">Trajectory data</text:span>: Processes standard GPS trace formats and check-in datasets.</text:p>
        </text:list-item>
      </text:list>
      <text:p text:style-name="First_20_paragraph">The <text:span text:style-name="Source_Text">CityBenchDataLoader</text:span> class provides structured access to city-specific datasets for nine world cities (Beijing, London, Paris, Tokyo, New York, Mumbai, Sydney, Moscow, Shanghai), supporting reproducible cross-city analysis. In the revised benchmark workflow, these data assets are also used directly by a lightweight evaluator so that tasks such as GeoQA, geolocation, mobility prediction, outdoor navigation, and urban exploration can be assessed as reusable data-plus-protocol problems rather than as tightly coupled benchmark executables.</text:p>
      <text:h text:style-name="Heading_20_3" text:outline-level="3"><text:bookmark-start text:name="id_44-extensibility"/>4.4 Extensibility<text:bookmark-end text:name="id_44-extensibility"/></text:h>
      <text:p text:style-name="First_20_paragraph">UrbanAgent is designed for extension along three axes:</text:p>
      <text:p text:style-name="Text_20_body"><text:span text:style-name="T1">New data sources</text:span> can be added by implementing a perception processor that converts raw data into the <text:span text:style-name="Source_Text">SpatialContext</text:span> structure.</text:p>
      <text:p text:style-name="Text_20_body"><text:span text:style-name="T1">New analysis tools</text:span> can be registered with the MCP tool layer through a single function call:</text:p>
      <text:p text:style-name="P62">mcp_tools.register_tool(</text:p>
      <text:p text:style-name="P63"><text:s text:c="4"/>name="analyze_green_coverage",</text:p>
      <text:p text:style-name="P64"><text:s text:c="4"/>description="Calculate urban green space coverage ratio",</text:p>
      <text:p text:style-name="P65"><text:s text:c="4"/>parameters={"features": "GeoDataFrame of vegetation polygons", "area": "Study area in sq meters"},</text:p>
      <text:p text:style-name="P66"><text:s text:c="4"/>handler=green_coverage_handler</text:p>
      <text:p text:style-name="P67">)</text:p>
      <text:p text:style-name="First_20_paragraph"><text:span text:style-name="T1">New LLM backends</text:span> can be integrated by implementing the client interface with <text:span text:style-name="Source_Text">generate()</text:span> and optional <text:span text:style-name="Source_Text">generate_with_vision()</text:span> methods.</text:p>
      <text:p text:style-name="Horizontal_20_Line"/>
      <text:h text:style-name="Heading_20_2" text:outline-level="2"><text:bookmark-start text:name="id_5-case-studies"/>5. Case Studies<text:bookmark-end text:name="id_5-case-studies"/></text:h>
      <text:p text:style-name="First_20_paragraph">We demonstrate UrbanAgent through three case studies that illustrate different aspects of the framework's capabilities. All case studies use the Tianzifang neighborhood in Shanghai, China—a historically significant urban area characterized by a fine-grained lane fabric (lilong), mixed commercial-residential use, and complex pedestrian circulation patterns—as the study site.</text:p>
      <text:h text:style-name="Heading_20_3" text:outline-level="3"><text:bookmark-start text:name="id_51-case-study-1-urban-walkability-assessment"/>5.1 Case Study 1: Urban Walkability Assessment<text:bookmark-end text:name="id_51-case-study-1-urban-walkability-assessment"/></text:h>
      <text:p text:style-name="First_20_paragraph"><text:span text:style-name="T1">Objective</text:span>: Assess and identify areas with low pedestrian walkability in the Tianzifang neighborhood.</text:p>
      <text:p text:style-name="Text_20_body"><text:span text:style-name="T1">Data sources</text:span>: OpenStreetMap (road network, building footprints, POIs) within a 500m radius of the neighborhood center.</text:p>
      <text:p text:style-name="Text_20_body"><text:span text:style-name="T1">Workflow</text:span>: The user invokes UrbanAgent with a natural language query:</text:p>
      <text:p text:style-name="P68">"Analyze pedestrian walkability in the Tianzifang area of Shanghai. Identify zones with poor walkability and suggest improvements."</text:p>
      <text:p text:style-name="First_20_paragraph">The agent executes the following pipeline:</text:p>
      <text:list text:style-name="L19">
        <text:list-item>
          <text:p text:style-name="P69"><text:span text:style-name="T1">Perception</text:span>: The OSM processor acquires 127 road segments, 342 building footprints, and 89 POIs. Road segments are classified by type (tertiary, residential, pedestrian, service) and pedestrian accessibility.</text:p>
        </text:list-item>
        <text:list-item>
          <text:p text:style-name="P69"><text:span text:style-name="T1">Cognition</text:span>: The dual-space cognition module constructs a topological graph with 23 junction nodes, 8 plaza nodes, 15 building cluster nodes, and 4 landmark nodes. 47 topological relations are identified, including 3 barrier relations (major roads acting as pedestrian barriers). The topological graph reveals that the northern portion of the study area has high connectivity (average node degree: 3.8) while the southern edge has poor connectivity (average degree: 1.5) due to arterial road barriers.</text:p>
        </text:list-item>
        <text:list-item>
          <text:p text:style-name="P69"><text:span text:style-name="T1">Decision</text:span>: The walkability measurement tool computes:</text:p>
          <text:list text:style-name="L20">
            <text:list-item>
              <text:p text:style-name="P70">Intersection density: 42 per km² (above the 40/km² threshold for walkable areas in the core, but only 18/km² in the southern zone)</text:p>
            </text:list-item>
            <text:list-item>
              <text:p text:style-name="P70">POI density: 156 per km² (high, reflecting the commercial character)</text:p>
            </text:list-item>
            <text:list-item>
              <text:p text:style-name="P70">Composite walkability score: 0.78 (core) vs. 0.42 (southern edge)</text:p>
            </text:list-item>
          </text:list>
          <text:p text:style-name="P69">The decision module identifies three intervention opportunities:</text:p>
          <text:list text:style-name="L21">
            <text:list-item>
              <text:p text:style-name="P71">A pedestrian bridge or at-grade crossing connecting two isolated junction nodes across Jianguo Road</text:p>
            </text:list-item>
            <text:list-item>
              <text:p text:style-name="P71">A pocket park in a high-density cluster currently lacking open space</text:p>
            </text:list-item>
            <text:list-item>
              <text:p text:style-name="P71">An activity node enhancement at the main north-south corridor intersection</text:p>
            </text:list-item>
          </text:list>
        </text:list-item>
        <text:list-item>
          <text:p text:style-name="P69"><text:span text:style-name="T1">Visualization</text:span>: The SVG overlay renders the analysis results on an accurate spatial base map, with connectivity gaps highlighted in red, proposed interventions in green/blue/orange, and walkability scores displayed as a color gradient.</text:p>
        </text:list-item>
      </text:list>
      <text:p text:style-name="First_20_paragraph"><text:span text:style-name="T1">Output</text:span>: A spatial analysis report with quantitative metrics, a topological graph visualization, an SVG overlay of proposed interventions, and a GeoJSON export for further analysis in standard GIS tools.</text:p>
      <text:p text:style-name="Text_20_body">Figure 4 summarizes the case-study output as a publication-facing schematic map. It is intended to communicate analytical structure and intervention logic even before a fully cartographically exact export is substituted into the final manuscript.</text:p>
      <text:p text:style-name="Text_20_body"><draw:frame draw:name="img4" svg:width="720.0pt" svg:height="465.0pt"><draw:image xlink:href="Pictures/3.svg" xlink:type="simple" xlink:show="embed" xlink:actuate="onLoad"/></draw:frame></text:p>
      <text:p text:style-name="Text_20_body"><text:span text:style-name="T1">Figure 4.</text:span> Walkability case-study summary for Tianzifang. The schematic map highlights high- and low-walkability zones, the major road barrier that reduces southern-edge connectivity, and three intervention types derived from the decision module: a crossing improvement, a pocket park, and an activity-node enhancement.</text:p>
      <text:p text:style-name="Text_20_body">This case study demonstrates UrbanAgent's capability to orchestrate a complete walkability analysis—from raw OSM data to actionable spatial proposals—through a single natural language query, a workflow that would typically require multiple separate tools and significant GIS expertise.</text:p>
      <text:h text:style-name="Heading_20_3" text:outline-level="3"><text:bookmark-start text:name="id_52-case-study-2-spatial-connectivity-analysis"/>5.2 Case Study 2: Spatial Connectivity Analysis<text:bookmark-end text:name="id_52-case-study-2-spatial-connectivity-analysis"/></text:h>
      <text:p text:style-name="First_20_paragraph"><text:span text:style-name="T1">Objective</text:span>: Evaluate the network connectivity of the lane fabric in Tianzifang and identify critical links whose removal would most impact connectivity.</text:p>
      <text:p text:style-name="Text_20_body"><text:span text:style-name="T1">Workflow</text:span>:</text:p>
      <text:list text:style-name="L22">
        <text:list-item>
          <text:p text:style-name="P72"><text:span text:style-name="T1">Perception</text:span>: Road network is acquired and parsed as a NetworkX graph with 156 nodes and 198 edges.</text:p>
        </text:list-item>
        <text:list-item>
          <text:p text:style-name="P72"><text:span text:style-name="T1">Cognition</text:span>: The topological graph construction identifies:</text:p>
          <text:list text:style-name="L23">
            <text:list-item>
              <text:p text:style-name="P73">3 connected components (main fabric, northern block, eastern enclave)</text:p>
            </text:list-item>
            <text:list-item>
              <text:p text:style-name="P73">Clustering coefficient: 0.12 (indicating a predominantly tree-like rather than grid-like structure)</text:p>
            </text:list-item>
            <text:list-item>
              <text:p text:style-name="P73">4 bridge edges whose removal would increase the number of connected components</text:p>
            </text:list-item>
          </text:list>
        </text:list-item>
        <text:list-item>
          <text:p text:style-name="P72"><text:span text:style-name="T1">Tool invocation</text:span>: The <text:span text:style-name="Source_Text">analyze_connectivity</text:span> MCP tool computes:</text:p>
          <text:list text:style-name="L24">
            <text:list-item>
              <text:p text:style-name="P74">Global connectivity: 0.67</text:p>
            </text:list-item>
            <text:list-item>
              <text:p text:style-name="P74">Local average connectivity: 2.4</text:p>
            </text:list-item>
            <text:list-item>
              <text:p text:style-name="P74">Maximum node degree: 6 (at the main intersection of Taikang Road and Lane 210)</text:p>
            </text:list-item>
            <text:list-item>
              <text:p text:style-name="P74">Number of isolated nodes: 2</text:p>
            </text:list-item>
          </text:list>
        </text:list-item>
        <text:list-item>
          <text:p text:style-name="P72"><text:span text:style-name="T1">Decision</text:span>: The agent identifies the 4 bridge edges as critical vulnerability points and proposes alternative path connections to create redundancy.</text:p>
        </text:list-item>
      </text:list>
      <text:p text:style-name="First_20_paragraph">This case study highlights the dual-space cognition's ability to provide both topological insights (bridge edges, connected components) and metric quantification (connectivity indices, distances) within a single analytical framework.</text:p>
      <text:h text:style-name="Heading_20_3" text:outline-level="3"><text:bookmark-start text:name="id_53-case-study-3-urban-exploration-planning"/>5.3 Case Study 3: Urban Exploration Planning<text:bookmark-end text:name="id_53-case-study-3-urban-exploration-planning"/></text:h>
      <text:p text:style-name="First_20_paragraph"><text:span text:style-name="T1">Objective</text:span>: Generate an optimal exploration route for a researcher who wants to experience the maximum diversity of urban environments within a 2-hour walking timeframe.</text:p>
      <text:p text:style-name="Text_20_body"><text:span text:style-name="T1">Workflow</text:span>:</text:p>
      <text:list text:style-name="L25">
        <text:list-item>
          <text:p text:style-name="P75"><text:span text:style-name="T1">Perception</text:span>: POIs are acquired and categorized into 12 functional classes (food, retail, cultural, residential, workshop, gallery, temple, park, etc.).</text:p>
        </text:list-item>
        <text:list-item>
          <text:p text:style-name="P75"><text:span text:style-name="T1">Cognition &amp; Memory</text:span>: The topological graph identifies activity centers (high POI diversity nodes). The memory module retrieves prior analyses of the area to inform the exploration plan.</text:p>
        </text:list-item>
        <text:list-item>
          <text:p text:style-name="P75"><text:span text:style-name="T1">Reasoning</text:span>: The exploration strategy optimizes for:</text:p>
          <text:list text:style-name="L26">
            <text:list-item>
              <text:p text:style-name="P76">POI category coverage (visiting at least one location from each top-8 category)</text:p>
            </text:list-item>
            <text:list-item>
              <text:p text:style-name="P76">Spatial diversity (maximizing geographic spread)</text:p>
            </text:list-item>
            <text:list-item>
              <text:p text:style-name="P76">Walking distance constraint (&lt; 4km for 2-hour comfortable walk)</text:p>
            </text:list-item>
            <text:list-item>
              <text:p text:style-name="P76">Experiential sequence (cultural → commercial → residential → food progression)</text:p>
            </text:list-item>
          </text:list>
        </text:list-item>
        <text:list-item>
          <text:p text:style-name="P75"><text:span text:style-name="T1">Output</text:span>: A sequenced exploration plan with 12 waypoints, estimated walking distances between stops, expected experience quality at each location, and total route statistics.</text:p>
        </text:list-item>
      </text:list>
      <text:p text:style-name="First_20_paragraph">Figure 5 shows the same exploration output as a route-oriented visual summary, emphasizing that the system produces interpretable spatial plans rather than only descriptive text.</text:p>
      <text:p text:style-name="Text_20_body"><draw:frame draw:name="img5" svg:width="720.0pt" svg:height="465.0pt"><draw:image xlink:href="Pictures/4.svg" xlink:type="simple" xlink:show="embed" xlink:actuate="onLoad"/></draw:frame></text:p>
      <text:p text:style-name="Text_20_body"><text:span text:style-name="T1">Figure 5.</text:span> Exploration-planning case study. The route is organized as a sequence of waypoints that jointly optimize POI diversity, spatial spread, and a two-hour walking constraint, while preserving an interpretable experiential progression across heritage, commercial, residential, and food-related destinations.</text:p>
      <text:p text:style-name="Horizontal_20_Line"/>
      <text:h text:style-name="Heading_20_2" text:outline-level="2"><text:bookmark-start text:name="id_6-benchmark-evaluation"/>6. Benchmark Evaluation<text:bookmark-end text:name="id_6-benchmark-evaluation"/></text:h>
      <text:h text:style-name="Heading_20_3" text:outline-level="3"><text:bookmark-start text:name="id_61-experimental-setup"/>6.1 Experimental Setup<text:bookmark-end text:name="id_61-experimental-setup"/></text:h>
      <text:p text:style-name="First_20_paragraph">To evaluate the current software revision on standardized urban tasks, we employ a <text:span text:style-name="T1">CityData-direct quick benchmark</text:span> derived from CityBench (Feng et al., 2024). This evaluator preserves the eight task families and CityBench data assets, but runs them through UrbanAgent's unified task interface rather than through the full original benchmark runtime whenever direct reuse is feasible. This distinction is important: several CityBench tasks are primarily data-and-prompt problems and can therefore be reused as framework-level benchmark assets, whereas traffic signal control still requires an adapter because it depends on simulator-specific state semantics.</text:p>
      <text:p text:style-name="Text_20_body"><text:span text:style-name="T1">Task types</text:span>: Population prediction (PP), object detection (OD), geolocation (GL), geographic Q&amp;A (GQ), mobility prediction (MP), traffic signal optimization (TS), outdoor navigation (ON), and urban exploration (UE).</text:p>
      <text:p text:style-name="Text_20_body"><text:span text:style-name="T1">Models reported in this draft revision</text:span>: Qwen (qwen-vl-plus / qwen3-vl family) and Kimi (kimi-k2.5), both used as text-plus-vision backends for the verified quick benchmark.</text:p>
      <text:p text:style-name="Text_20_body"><text:span text:style-name="T1">Configurations</text:span>: The same backend is evaluated in two modes:</text:p>
      <text:list text:style-name="L27">
        <text:list-item>
          <text:p text:style-name="P77"><text:span text:style-name="T1">Baseline agent path</text:span>: the unified execution pipeline is used with generic reasoning and minimal task-specific adaptation.</text:p>
        </text:list-item>
        <text:list-item>
          <text:p text:style-name="P77"><text:span text:style-name="T1">Enhanced agent path</text:span>: the revised UrbanAgent pipeline uses structured task payloads, task-specific reasoning routines, MCP-aligned action execution, and benchmark adapters where needed.</text:p>
        </text:list-item>
      </text:list>
      <text:p text:style-name="First_20_paragraph"><text:span text:style-name="T1">Metric</text:span>: For the current quick benchmark, we report the task-outcome score used by the CityData-direct evaluator. Each task type is sampled with 10 instances, yielding 80 evaluations per configuration. Traffic signal control is currently evaluated in proxy mode through the traffic-signal adapter unless full CitySim state is wired into the runtime.</text:p>
      <text:h text:style-name="Heading_20_3" text:outline-level="3"><text:bookmark-start text:name="id_62-results"/>6.2 Results<text:bookmark-end text:name="id_62-results"/></text:h>
      <text:p text:style-name="First_20_paragraph">Table 2 presents the verified quick-benchmark results across all eight task types.</text:p>
      <text:p text:style-name="Text_20_body"><text:span text:style-name="T1">Table 2.</text:span> Average scores across eight CityData-direct task types in the current quick benchmark. Best score per column in <text:span text:style-name="T1">bold</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header-rows>
          <table:table-row>
            <table:table-cell table:style-name="TableHeaderRowCell" office:value-type="string">
              <text:p text:style-name="Table_20_Heading">Configuration</text:p>
            </table:table-cell>
            <table:table-cell table:style-name="TableHeaderRowCell" office:value-type="string">
              <text:p text:style-name="Table_20_Heading">PP</text:p>
            </table:table-cell>
            <table:table-cell table:style-name="TableHeaderRowCell" office:value-type="string">
              <text:p text:style-name="Table_20_Heading">OD</text:p>
            </table:table-cell>
            <table:table-cell table:style-name="TableHeaderRowCell" office:value-type="string">
              <text:p text:style-name="Table_20_Heading">GL</text:p>
            </table:table-cell>
            <table:table-cell table:style-name="TableHeaderRowCell" office:value-type="string">
              <text:p text:style-name="Table_20_Heading">GQ</text:p>
            </table:table-cell>
            <table:table-cell table:style-name="TableHeaderRowCell" office:value-type="string">
              <text:p text:style-name="Table_20_Heading">MP</text:p>
            </table:table-cell>
            <table:table-cell table:style-name="TableHeaderRowCell" office:value-type="string">
              <text:p text:style-name="Table_20_Heading">TS</text:p>
            </table:table-cell>
            <table:table-cell table:style-name="TableHeaderRowCell" office:value-type="string">
              <text:p text:style-name="Table_20_Heading">ON</text:p>
            </table:table-cell>
            <table:table-cell table:style-name="TableHeaderRowCell" office:value-type="string">
              <text:p text:style-name="Table_20_Heading">UE</text:p>
            </table:table-cell>
            <table:table-cell table:style-name="TableHeaderRowCell" office:value-type="string">
              <text:p text:style-name="Table_20_Heading"><text:span text:style-name="T1">Avg</text:span></text:p>
            </table:table-cell>
          </table:table-row>
        </table:table-header-rows>
        <table:table-row>
          <table:table-cell table:style-name="TableRowCell" office:value-type="string">
            <text:p text:style-name="Table_20_Contents">Qwen baseline</text:p>
          </table:table-cell>
          <table:table-cell table:style-name="TableRowCell" office:value-type="string">
            <text:p text:style-name="Table_20_Contents">0.0626</text:p>
          </table:table-cell>
          <table:table-cell table:style-name="TableRowCell" office:value-type="string">
            <text:p text:style-name="Table_20_Contents">0.0000</text:p>
          </table:table-cell>
          <table:table-cell table:style-name="TableRowCell" office:value-type="string">
            <text:p text:style-name="Table_20_Contents">0.8000</text:p>
          </table:table-cell>
          <table:table-cell table:style-name="TableRowCell" office:value-type="string">
            <text:p text:style-name="Table_20_Contents">0.1000</text:p>
          </table:table-cell>
          <table:table-cell table:style-name="TableRowCell" office:value-type="string">
            <text:p text:style-name="Table_20_Contents">0.0000</text:p>
          </table:table-cell>
          <table:table-cell table:style-name="TableRowCell" office:value-type="string">
            <text:p text:style-name="Table_20_Contents">1.0000</text:p>
          </table:table-cell>
          <table:table-cell table:style-name="TableRowCell" office:value-type="string">
            <text:p text:style-name="Table_20_Contents">0.0000</text:p>
          </table:table-cell>
          <table:table-cell table:style-name="TableRowCell" office:value-type="string">
            <text:p text:style-name="Table_20_Contents">0.0000</text:p>
          </table:table-cell>
          <table:table-cell table:style-name="TableRowCell" office:value-type="string">
            <text:p text:style-name="Table_20_Contents">0.2453</text:p>
          </table:table-cell>
        </table:table-row>
        <table:table-row>
          <table:table-cell table:style-name="TableRowCell" office:value-type="string">
            <text:p text:style-name="Table_20_Contents">Qwen enhanced</text:p>
          </table:table-cell>
          <table:table-cell table:style-name="TableRowCell" office:value-type="string">
            <text:p text:style-name="Table_20_Contents">0.0000</text:p>
          </table:table-cell>
          <table:table-cell table:style-name="TableRowCell" office:value-type="string">
            <text:p text:style-name="Table_20_Contents">0.0069</text:p>
          </table:table-cell>
          <table:table-cell table:style-name="TableRowCell" office:value-type="string">
            <text:p text:style-name="Table_20_Contents">0.8000</text:p>
          </table:table-cell>
          <table:table-cell table:style-name="TableRowCell" office:value-type="string">
            <text:p text:style-name="Table_20_Contents">0.1000</text:p>
          </table:table-cell>
          <table:table-cell table:style-name="TableRowCell" office:value-type="string">
            <text:p text:style-name="Table_20_Contents">0.4000</text:p>
          </table:table-cell>
          <table:table-cell table:style-name="TableRowCell" office:value-type="string">
            <text:p text:style-name="Table_20_Contents">1.0000</text:p>
          </table:table-cell>
          <table:table-cell table:style-name="TableRowCell" office:value-type="string">
            <text:p text:style-name="Table_20_Contents">1.0000</text:p>
          </table:table-cell>
          <table:table-cell table:style-name="TableRowCell" office:value-type="string">
            <text:p text:style-name="Table_20_Contents">1.0000</text:p>
          </table:table-cell>
          <table:table-cell table:style-name="TableRowCell" office:value-type="string">
            <text:p text:style-name="Table_20_Contents">0.5384</text:p>
          </table:table-cell>
        </table:table-row>
        <table:table-row>
          <table:table-cell table:style-name="TableRowCell" office:value-type="string">
            <text:p text:style-name="Table_20_Contents">Kimi baseline</text:p>
          </table:table-cell>
          <table:table-cell table:style-name="TableRowCell" office:value-type="string">
            <text:p text:style-name="Table_20_Contents">0.0479</text:p>
          </table:table-cell>
          <table:table-cell table:style-name="TableRowCell" office:value-type="string">
            <text:p text:style-name="Table_20_Contents">0.0000</text:p>
          </table:table-cell>
          <table:table-cell table:style-name="TableRowCell" office:value-type="string">
            <text:p text:style-name="Table_20_Contents">0.6000</text:p>
          </table:table-cell>
          <table:table-cell table:style-name="TableRowCell" office:value-type="string">
            <text:p text:style-name="Table_20_Contents">0.1000</text:p>
          </table:table-cell>
          <table:table-cell table:style-name="TableRowCell" office:value-type="string">
            <text:p text:style-name="Table_20_Contents">0.2000</text:p>
          </table:table-cell>
          <table:table-cell table:style-name="TableRowCell" office:value-type="string">
            <text:p text:style-name="Table_20_Contents">1.0000</text:p>
          </table:table-cell>
          <table:table-cell table:style-name="TableRowCell" office:value-type="string">
            <text:p text:style-name="Table_20_Contents">0.0000</text:p>
          </table:table-cell>
          <table:table-cell table:style-name="TableRowCell" office:value-type="string">
            <text:p text:style-name="Table_20_Contents">0.0000</text:p>
          </table:table-cell>
          <table:table-cell table:style-name="TableRowCell" office:value-type="string">
            <text:p text:style-name="Table_20_Contents">0.2435</text:p>
          </table:table-cell>
        </table:table-row>
        <table:table-row>
          <table:table-cell table:style-name="TableRowCell" office:value-type="string">
            <text:p text:style-name="Table_20_Contents">Kimi enhanced</text:p>
          </table:table-cell>
          <table:table-cell table:style-name="TableRowCell" office:value-type="string">
            <text:p text:style-name="Table_20_Contents">0.0000</text:p>
          </table:table-cell>
          <table:table-cell table:style-name="TableRowCell" office:value-type="string">
            <text:p text:style-name="Table_20_Contents">0.0000</text:p>
          </table:table-cell>
          <table:table-cell table:style-name="TableRowCell" office:value-type="string">
            <text:p text:style-name="Table_20_Contents">0.7000</text:p>
          </table:table-cell>
          <table:table-cell table:style-name="TableRowCell" office:value-type="string">
            <text:p text:style-name="Table_20_Contents">0.3000</text:p>
          </table:table-cell>
          <table:table-cell table:style-name="TableRowCell" office:value-type="string">
            <text:p text:style-name="Table_20_Contents">0.4000</text:p>
          </table:table-cell>
          <table:table-cell table:style-name="TableRowCell" office:value-type="string">
            <text:p text:style-name="Table_20_Contents">1.0000</text:p>
          </table:table-cell>
          <table:table-cell table:style-name="TableRowCell" office:value-type="string">
            <text:p text:style-name="Table_20_Contents">1.0000</text:p>
          </table:table-cell>
          <table:table-cell table:style-name="TableRowCell" office:value-type="string">
            <text:p text:style-name="Table_20_Contents">1.0000</text:p>
          </table:table-cell>
          <table:table-cell table:style-name="TableRowCell" office:value-type="string">
            <text:p text:style-name="Table_20_Contents"><text:span text:style-name="T1">0.5500</text:span></text:p>
          </table:table-cell>
        </table:table-row>
      </table:table>
      <text:p text:style-name="First_20_paragraph"><text:span text:style-name="T2">PP=Population Prediction, OD=Object Detection, GL=Geolocation, GQ=Geographic Q&amp;A, MP=Mobility Prediction, TS=Traffic Signal, ON=Outdoor Navigation, UE=Urban Exploration.</text:span></text:p>
      <text:p text:style-name="Text_20_body">Both multimodal backends show large gains after the software revision. The overall average increases from 0.2453 to 0.5384 for Qwen and from 0.2435 to 0.5500 for Kimi.</text:p>
      <text:p text:style-name="Text_20_body"><text:span text:style-name="T1">Table 3.</text:span> Relative improvement of the enhanced configurations over the corresponding baseline quick-benchmark configurations.</text:p>
      <table:table table:name="Table5" table:style-name="Table5">
        <table:table-column table:style-name="Table5.A"/>
        <table:table-column table:style-name="Table5.B"/>
        <table:table-header-rows>
          <table:table-row>
            <table:table-cell table:style-name="TableHeaderRowCell" office:value-type="string">
              <text:p text:style-name="Table_20_Heading">Configuration Pair</text:p>
            </table:table-cell>
            <table:table-cell table:style-name="TableHeaderRowCell" office:value-type="string">
              <text:p text:style-name="Table_20_Heading">Improvement</text:p>
            </table:table-cell>
          </table:table-row>
        </table:table-header-rows>
        <table:table-row>
          <table:table-cell table:style-name="TableRowCell" office:value-type="string">
            <text:p text:style-name="Table_20_Contents">Qwen enhanced vs. Qwen baseline</text:p>
          </table:table-cell>
          <table:table-cell table:style-name="TableRowCell" office:value-type="string">
            <text:p text:style-name="Table_20_Contents">+119.5%</text:p>
          </table:table-cell>
        </table:table-row>
        <table:table-row>
          <table:table-cell table:style-name="TableRowCell" office:value-type="string">
            <text:p text:style-name="Table_20_Contents">Kimi enhanced vs. Kimi baseline</text:p>
          </table:table-cell>
          <table:table-cell table:style-name="TableRowCell" office:value-type="string">
            <text:p text:style-name="Table_20_Contents">+125.9%</text:p>
          </table:table-cell>
        </table:table-row>
      </table:table>
      <text:p text:style-name="First_20_paragraph">Figure 6 summarizes the overall multi-backend benchmark result and shows that the same engineering changes improve both multimodal backends.</text:p>
      <text:p text:style-name="Text_20_body"><draw:frame draw:name="img6" svg:width="690.0pt" svg:height="420.0pt"><draw:image xlink:href="Pictures/5.svg" xlink:type="simple" xlink:show="embed" xlink:actuate="onLoad"/></draw:frame></text:p>
      <text:p text:style-name="Text_20_body"><text:span text:style-name="T1">Figure 6.</text:span> Overall quick-benchmark comparison for Qwen and Kimi. Both backends improve substantially under the enhanced UrbanAgent pipeline, indicating that the software revision generalizes beyond a single multimodal model while preserving the same qualitative gain pattern.</text:p>
      <text:h text:style-name="Heading_20_3" text:outline-level="3"><text:bookmark-start text:name="id_63-analysis"/>6.3 Analysis<text:bookmark-end text:name="id_63-analysis"/></text:h>
      <text:p text:style-name="First_20_paragraph">Several findings emerge from the current benchmark revision:</text:p>
      <text:p text:style-name="Text_20_body"><text:span text:style-name="T1">Finding 1: Structured task handling materially improves the framework-level benchmark for both multimodal backends.</text:span> The enhanced configurations raise the average score from 0.2453 to 0.5384 for Qwen and from 0.2435 to 0.5500 for Kimi, indicating that the recent software changes are not merely architectural cleanup but translate into measurable task gains.</text:p>
      <text:p text:style-name="Text_20_body"><text:span text:style-name="T1">Finding 2: The largest gains come from tasks that benefit from explicit structure rather than raw image description.</text:span> For both Qwen and Kimi, mobility prediction improves to 0.4000, while outdoor navigation and urban exploration rise from 0.0000 to 1.0000. These are precisely the tasks where structured histories, route summaries, candidate ranking, and task-specific action formatting matter most.</text:p>
      <text:p text:style-name="Text_20_body"><text:span text:style-name="T1">Finding 3: Kimi and Qwen show similar gain structure but slightly different strengths.</text:span> Qwen remains stronger in geolocation in the current quick benchmark (0.8000 vs. 0.7000 in the enhanced setting), whereas Kimi improves more clearly on GeoQA (0.3000 vs. 0.1000). This suggests that the software layer can help multiple models while still exposing model-specific strengths and weaknesses.</text:p>
      <text:p text:style-name="Text_20_body"><text:span text:style-name="T1">Finding 4: Vision-heavy tasks remain the main weakness.</text:span> Population prediction collapses to 0.0000 in both enhanced settings, while object detection remains near zero for both models. The current software revision therefore improves reasoning and action alignment much more than it improves urban visual perception. Better multimodal prompting, specialized vision tools, or domain-tuned perception modules will be needed here.</text:p>
      <text:p text:style-name="Text_20_body"><text:span text:style-name="T1">Finding 5: The quick benchmark is diagnostic, not yet final.</text:span> Traffic signal control saturates in the current proxy evaluation, and several task families still depend on simplified scoring assumptions. The present benchmark should therefore be interpreted as a reproducible development-stage validation rather than a definitive leaderboard result.</text:p>
      <text:p text:style-name="Text_20_body"><text:span text:style-name="T1">Finding 6: Decoupling benchmark assets from benchmark runtime is useful in itself.</text:span> The CityData-direct evaluator shows that a meaningful portion of CityBench can be reused as a software-facing benchmark asset rather than only as a monolithic benchmark executable. This is important for open urban software research because it allows benchmark tasks to serve simultaneously as evaluation cases and as reusable regression tests for framework development.</text:p>
      <text:p text:style-name="Horizontal_20_Line"/>
      <text:h text:style-name="Heading_20_2" text:outline-level="2"><text:bookmark-start text:name="id_7-discussion"/>7. Discussion<text:bookmark-end text:name="id_7-discussion"/></text:h>
      <text:h text:style-name="Heading_20_3" text:outline-level="3"><text:bookmark-start text:name="id_71-urbanagent-as-open-urban-data-science-infrastructure"/>7.1 UrbanAgent as Open Urban Data Science Infrastructure<text:bookmark-end text:name="id_71-urbanagent-as-open-urban-data-science-infrastructure"/></text:h>
      <text:p text:style-name="First_20_paragraph">UrbanAgent is positioned within the emerging ecosystem of open urban data science tools—alongside OSMnx, Madina, greenR, and ZenSVI—but addresses a different tier of the analytical stack. While existing tools provide specialized geospatial computation (network analysis, accessibility, greenery), UrbanAgent provides the <text:span text:style-name="T2">orchestration layer</text:span> that composes these tools into coherent analytical workflows. The recent connector-and-adapter refactor sharpens this positioning further: the framework is no longer described as a benchmark wrapper with auxiliary tools, but as a general orchestration substrate capable of coordinating native Python geospatial libraries, benchmark adapters, and external systems such as Rhino.Compute / Grasshopper through a common agent-facing interface.</text:p>
      <text:p text:style-name="Text_20_body">The dual-space spatial cognition model represents a novel bridge between traditional urban morphological analysis (space syntax, network analysis) and LLM-based reasoning. By structuring spatial information as topological graphs with vector anchoring, we provide LLMs with representations that preserve the structural properties of urban form—properties that are lost when spatial data is flattened into text descriptions.</text:p>
      <text:h text:style-name="Heading_20_3" text:outline-level="3"><text:bookmark-start text:name="id_72-implications-for-urban-research-practice"/>7.2 Implications for Urban Research Practice<text:bookmark-end text:name="id_72-implications-for-urban-research-practice"/></text:h>
      <text:p text:style-name="First_20_paragraph">UrbanAgent lowers the barrier to conducting multi-step urban spatial analysis. A researcher who would previously need to write code integrating osmnx, geopandas, networkx, and matplotlib can now express their analytical intent in natural language and receive structured spatial analysis outputs. This democratization has particular value for:</text:p>
      <text:list text:style-name="L28">
        <text:list-item>
          <text:p text:style-name="P78"><text:span text:style-name="T1">Interdisciplinary researchers</text:span> (e.g., public health, sociology) who study urban phenomena but lack GIS programming skills.</text:p>
        </text:list-item>
        <text:list-item>
          <text:p text:style-name="P78"><text:span text:style-name="T1">Rapid urban assessment</text:span> scenarios where quick spatial analysis of unfamiliar areas is needed.</text:p>
        </text:list-item>
        <text:list-item>
          <text:p text:style-name="P78"><text:span text:style-name="T1">Teaching and training</text:span> in urban data science, where the agent can demonstrate analytical workflows step by step.</text:p>
        </text:list-item>
      </text:list>
      <text:h text:style-name="Heading_20_3" text:outline-level="3"><text:bookmark-start text:name="id_73-limitations-and-future-work"/>7.3 Limitations and Future Work<text:bookmark-end text:name="id_73-limitations-and-future-work"/></text:h>
      <text:p text:style-name="First_20_paragraph">Several limitations should be acknowledged:</text:p>
      <text:p text:style-name="Text_20_body"><text:span text:style-name="T1">LLM reasoning accuracy.</text:span> The agent's analytical quality is bounded by the underlying LLM's capabilities. Population prediction and mobility forecasting remain challenging because they require quantitative modeling beyond current LLM reasoning.</text:p>
      <text:p text:style-name="Text_20_body"><text:span text:style-name="T1">Tool and connector coverage.</text:span> The current MCP tool set covers fundamental spatial analysis operations and now supports an initial connector interface for external parametric design platforms. However, specialized tools for advanced analyses (e.g., spatial regression, land-use change detection, 3D morphology) and more production-hardened connectors for GIS servers, simulation engines, and CAD platforms remain future work. The Rhino/Grasshopper path is now operational at the connector level, but still depends on a running Rhino.Compute or Hops service and has not yet been demonstrated in a full end-to-end urban design case study.</text:p>
      <text:p text:style-name="Text_20_body"><text:span text:style-name="T1">Real-time data.</text:span> UrbanAgent currently processes static data snapshots. Integration with real-time urban data streams (traffic sensors, transit feeds, social media) would enable temporal analysis.</text:p>
      <text:p text:style-name="Text_20_body"><text:span text:style-name="T1">Evaluation completeness.</text:span> The CityBench-derived quick benchmark reported here is intentionally lightweight and should be interpreted as a development-stage validation rather than a final benchmark paper result. It verifies that recent software changes improve several task families, but a fuller study should include additional backends, larger sample counts, and direct comparison against the original CityBench runtime wherever feasible.</text:p>
      <text:p text:style-name="Text_20_body"><text:span text:style-name="T1">Scalability.</text:span> Processing very large urban areas (city-wide analysis) may exceed LLM context windows and tool processing capacity. Hierarchical decomposition strategies are needed for scale.</text:p>
      <text:p text:style-name="Text_20_body">Future work will focus on: (1) expanding the MCP tool library with specialized urban analysis tools (space syntax, urban climate, transport modeling); (2) broadening the connector layer to additional GIS servers, databases, and design platforms; (3) implementing multi-agent collaborative analysis where specialized agents handle sub-tasks; (4) integrating real-time urban data sources; and (5) developing a web-based interface for non-programming users.</text:p>
      <text:p text:style-name="Horizontal_20_Line"/>
      <text:h text:style-name="Heading_20_2" text:outline-level="2"><text:bookmark-start text:name="id_8-conclusion"/>8. Conclusion<text:bookmark-end text:name="id_8-conclusion"/></text:h>
      <text:p text:style-name="First_20_paragraph">We have presented UrbanAgent, an open-source Python framework for LLM-orchestrated urban spatial analysis. By combining multi-source perception, dual-space spatial cognition, structured reasoning, hierarchical memory, and an MCP-facing tool layer backed by connectors and adapters, UrbanAgent provides a general-purpose platform for conducting and automating urban data science workflows. The latest software revision strengthens the framework in two practical directions: it improves task execution through structured reasoning and unified action dispatch, and it broadens interoperability through explicit connector abstractions for external systems such as Rhino.Compute / Grasshopper. Current quick-benchmark results across both Qwen and Kimi show that these engineering changes already translate into substantial gains on several urban task types, while also making the remaining perception bottlenecks easier to diagnose. We release UrbanAgent as open-source software with documentation and tutorials, contributing to the growing ecosystem of open tools for urban data science.</text:p>
      <text:p text:style-name="Horizontal_20_Line"/>
      <text:h text:style-name="Heading_20_2" text:outline-level="2"><text:bookmark-start text:name="data-availability-statement"/>Data Availability Statement<text:bookmark-end text:name="data-availability-statement"/></text:h>
      <text:p text:style-name="First_20_paragraph">UrbanAgent is released as open-source software at [GitHub repository URL]. All spatial data used in the case studies is derived from OpenStreetMap and is freely available. CityBench benchmark data is available from [CityBench repository URL]. Jupyter notebooks reproducing the case studies are included in the repository, and the current quick-benchmark workflow is implemented as a reproducible script in <text:span text:style-name="Source_Text">scripts/benchmarks/run_citydata_quick_benchmark.py</text:span>. Connector setup for Rhino / Grasshopper interoperability is documented in <text:span text:style-name="Source_Text">docs/RHINO_GRASSHOPPER_CONNECTOR_SETUP.md</text:span>.</text:p>
      <text:p text:style-name="Horizontal_20_Line"/>
      <text:h text:style-name="Heading_20_2" text:outline-level="2"><text:bookmark-start text:name="references"/>References<text:bookmark-end text:name="references"/></text:h>
      <text:list text:style-name="L29">
        <text:list-item>
          <text:p text:style-name="P79">Bai, H., et al. (2024). LLaVA-SpaceSGG: Visual Instruct Tuning for Open-Vocabulary Spatial Scene Graph Generation with Enhanced Spatial Relations. <text:span text:style-name="T2">arXiv preprint arXiv:2412.12322</text:span>.</text:p>
        </text:list-item>
        <text:list-item>
          <text:p text:style-name="P79">Biljecki, F., et al. (2021). Street view imagery in urban analytics and GIS: A review. <text:span text:style-name="T2">Landscape and Urban Planning</text:span>, 215, 104217.</text:p>
        </text:list-item>
        <text:list-item>
          <text:p text:style-name="P79">Boeing, G. (2017). OSMnx: New methods for acquiring, constructing, analyzing, and visualizing complex street networks. <text:span text:style-name="T2">Computers, Environment and Urban Systems</text:span>, 65, 126–139.</text:p>
        </text:list-item>
        <text:list-item>
          <text:p text:style-name="P79">Feng, Y., et al. (2024). CityBench: Evaluating the capabilities of large language model as world model. <text:span text:style-name="T2">arXiv preprint arXiv:2406.13945</text:span>.</text:p>
        </text:list-item>
        <text:list-item>
          <text:p text:style-name="P79">Fu, Y., et al. (2024). CartoAgent: An LLM Agent for Automated Cartographic Styling. <text:span text:style-name="T2">Proceedings of GIScience 2024</text:span>.</text:p>
        </text:list-item>
        <text:list-item>
          <text:p text:style-name="P79">Hillier, B., &amp; Hanson, J. (1984). <text:span text:style-name="T2">The Social Logic of Space</text:span>. Cambridge University Press.</text:p>
        </text:list-item>
        <text:list-item>
          <text:p text:style-name="P79">Ito, K., et al. (2024). ZenSVI: An Open-Source Software for the Integrated Analysis of Street-View Imagery. <text:span text:style-name="T2">Environment and Planning B</text:span>, under review.</text:p>
        </text:list-item>
        <text:list-item>
          <text:p text:style-name="P79">Jain, A., et al. (2024). GeoCogent: Benchmarking Geospatial Code Generation Capabilities of Large Language Models. <text:span text:style-name="T2">SIGSPATIAL 2024</text:span>.</text:p>
        </text:list-item>
        <text:list-item>
          <text:p text:style-name="P79">Jordahl, K., et al. (2020). geopandas/geopandas: v0.8.1. <text:span text:style-name="T2">Zenodo</text:span>.</text:p>
        </text:list-item>
        <text:list-item>
          <text:p text:style-name="P79">Krishna, R., et al. (2017). Visual genome: Connecting language and vision using crowdsourced dense image annotations. <text:span text:style-name="T2">IJCV</text:span>, 123(1), 32–73.</text:p>
        </text:list-item>
        <text:list-item>
          <text:p text:style-name="P79">Li, Y., et al. (2024). UrbanGPT: Spatio-temporal large language models. <text:span text:style-name="T2">KDD 2024</text:span>.</text:p>
        </text:list-item>
        <text:list-item>
          <text:p text:style-name="P79">Li, Y., et al. (2024b). OpenCity: Open Spatio-Temporal Foundation Models for Urban Applications. <text:span text:style-name="T2">arXiv preprint</text:span>.</text:p>
        </text:list-item>
        <text:list-item>
          <text:p text:style-name="P79">Rey, S. J., &amp; Anselin, L. (2007). PySAL: A python library of spatial analytical methods. <text:span text:style-name="T2">The Review of Regional Studies</text:span>, 37(1), 5–27.</text:p>
        </text:list-item>
        <text:list-item>
          <text:p text:style-name="P79">Tversky, B. (2003). Structures of mental spaces: How people think about space. <text:span text:style-name="T2">Environment and Behavior</text:span>, 35(1), 66–80.</text:p>
        </text:list-item>
        <text:list-item>
          <text:p text:style-name="P79">Wang, Z., et al. (2024). AutoBEE: Automated LLM-based Building Energy Estimation. <text:span text:style-name="T2">Energy and Buildings</text:span>, 312, 114202.</text:p>
        </text:list-item>
        <text:list-item>
          <text:p text:style-name="P79">Zhang, Y., et al. (2024). GeoGPT: Understanding and Processing Geospatial Tasks through An Autonomous GPT. <text:span text:style-name="T2">arXiv preprint arXiv:2307.07930</text:span>.</text:p>
        </text:list-item>
        <text:list-item>
          <text:p text:style-name="P79">Zhong, Y., et al. (2024). TiMem: A Time-Sensitive Memory Mechanism for Large Language Model Agents. <text:span text:style-name="T2">arXiv preprint</text:span>.</text:p>
        </text:list-item>
      </text:list>
      <text:p text:style-name="Horizontal_20_Line"/>
      <text:h text:style-name="Heading_20_2" text:outline-level="2"><text:bookmark-start text:name="appendix-a-mcp-tool-specifications"/>Appendix A: MCP Tool Specifications<text:bookmark-end text:name="appendix-a-mcp-tool-specifications"/></text:h>
      <text:h text:style-name="Heading_20_3" text:outline-level="3"><text:bookmark-start text:name="a1-fetch_osm_data"/>A.1 fetch_osm_data<text:bookmark-end text:name="a1-fetch_osm_data"/></text:h>
      <text:p text:style-name="P80">{</text:p>
      <text:p text:style-name="P81"><text:s text:c="2"/>"name": "fetch_osm_data",</text:p>
      <text:p text:style-name="P82"><text:s text:c="2"/>"description": "Fetch and parse OpenStreetMap data for a specified location",</text:p>
      <text:p text:style-name="P83"><text:s text:c="2"/>"parameters": {</text:p>
      <text:p text:style-name="P84"><text:s text:c="4"/>"location": {"type": "string", "description": "Place name or 'lat,lon' coordinate"},</text:p>
      <text:p text:style-name="P85"><text:s text:c="4"/>"radius": {"type": "number", "description": "Search radius in meters"},</text:p>
      <text:p text:style-name="P86"><text:s text:c="4"/>"data_types": {"type": "array", "items": "string", "description": "Types to fetch: roads, buildings, pois"}</text:p>
      <text:p text:style-name="P87"><text:s text:c="2"/>}</text:p>
      <text:p text:style-name="P88">}</text:p>
      <text:h text:style-name="Heading_20_3" text:outline-level="3"><text:bookmark-start text:name="a2-analyze_connectivity"/>A.2 analyze_connectivity<text:bookmark-end text:name="a2-analyze_connectivity"/></text:h>
      <text:p text:style-name="P89">{</text:p>
      <text:p text:style-name="P90"><text:s text:c="2"/>"name": "analyze_connectivity",</text:p>
      <text:p text:style-name="P91"><text:s text:c="2"/>"description": "Analyze road network connectivity using graph theory",</text:p>
      <text:p text:style-name="P92"><text:s text:c="2"/>"parameters": {</text:p>
      <text:p text:style-name="P93"><text:s text:c="4"/>"road_network": {"type": "GeoDataFrame", "description": "Road network data"}</text:p>
      <text:p text:style-name="P94"><text:s text:c="2"/>},</text:p>
      <text:p text:style-name="P95"><text:s text:c="2"/>"returns": {</text:p>
      <text:p text:style-name="P96"><text:s text:c="4"/>"global_connectivity": "float",</text:p>
      <text:p text:style-name="P97"><text:s text:c="4"/>"local_connectivity": "float",</text:p>
      <text:p text:style-name="P98"><text:s text:c="4"/>"max_degree": "int",</text:p>
      <text:p text:style-name="P99"><text:s text:c="4"/>"isolated_nodes": "int"</text:p>
      <text:p text:style-name="P100"><text:s text:c="2"/>}</text:p>
      <text:p text:style-name="P101">}</text:p>
      <text:h text:style-name="Heading_20_3" text:outline-level="3"><text:bookmark-start text:name="a3-measure_accessibility"/>A.3 measure_accessibility<text:bookmark-end text:name="a3-measure_accessibility"/></text:h>
      <text:p text:style-name="P102">{</text:p>
      <text:p text:style-name="P103"><text:s text:c="2"/>"name": "measure_accessibility",</text:p>
      <text:p text:style-name="P104"><text:s text:c="2"/>"description": "Measure spatial accessibility from buildings to target facilities",</text:p>
      <text:p text:style-name="P105"><text:s text:c="2"/>"parameters": {</text:p>
      <text:p text:style-name="P106"><text:s text:c="4"/>"buildings": {"type": "GeoDataFrame"},</text:p>
      <text:p text:style-name="P107"><text:s text:c="4"/>"targets": {"type": "GeoDataFrame"},</text:p>
      <text:p text:style-name="P108"><text:s text:c="4"/>"threshold": {"type": "number", "description": "Maximum acceptable distance in meters"}</text:p>
      <text:p text:style-name="P109"><text:s text:c="2"/>}</text:p>
      <text:p text:style-name="P110">}</text:p>
      <text:h text:style-name="Heading_20_3" text:outline-level="3"><text:bookmark-start text:name="a4-calculate_density"/>A.4 calculate_density<text:bookmark-end text:name="a4-calculate_density"/></text:h>
      <text:p text:style-name="P111">{</text:p>
      <text:p text:style-name="P112"><text:s text:c="2"/>"name": "calculate_density",</text:p>
      <text:p text:style-name="P113"><text:s text:c="2"/>"description": "Calculate grid-based spatial density distribution",</text:p>
      <text:p text:style-name="P114"><text:s text:c="2"/>"parameters": {</text:p>
      <text:p text:style-name="P115"><text:s text:c="4"/>"features": {"type": "GeoDataFrame"},</text:p>
      <text:p text:style-name="P116"><text:s text:c="4"/>"grid_size": {"type": "number", "description": "Grid cell size in meters"}</text:p>
      <text:p text:style-name="P117"><text:s text:c="2"/>}</text:p>
      <text:p text:style-name="P118">}</text:p>
      <text:h text:style-name="Heading_20_3" text:outline-level="3"><text:bookmark-start text:name="a5-generate_svg_overlay"/>A.5 generate_svg_overlay<text:bookmark-end text:name="a5-generate_svg_overlay"/></text:h>
      <text:p text:style-name="P119">{</text:p>
      <text:p text:style-name="P120"><text:s text:c="2"/>"name": "generate_svg_overlay",</text:p>
      <text:p text:style-name="P121"><text:s text:c="2"/>"description": "Generate coordinate-accurate SVG visualization overlay",</text:p>
      <text:p text:style-name="P122"><text:s text:c="2"/>"parameters": {</text:p>
      <text:p text:style-name="P123"><text:s text:c="4"/>"raw_features": {"type": "dict", "description": "Building and road features"},</text:p>
      <text:p text:style-name="P124"><text:s text:c="4"/>"intervention_areas": {"type": "list", "description": "Proposed spatial interventions"},</text:p>
      <text:p text:style-name="P125"><text:s text:c="4"/>"bbox": {"type": "tuple", "description": "Bounding box (minx, miny, maxx, maxy)"}</text:p>
      <text:p text:style-name="P126"><text:s text:c="2"/>}</text:p>
      <text:p text:style-name="P127">}</text:p>
      <text:h text:style-name="Heading_20_3" text:outline-level="3"><text:bookmark-start text:name="a6-export_geojson"/>A.6 export_geojson<text:bookmark-end text:name="a6-export_geojson"/></text:h>
      <text:p text:style-name="P128">{</text:p>
      <text:p text:style-name="P129"><text:s text:c="2"/>"name": "export_geojson",</text:p>
      <text:p text:style-name="P130"><text:s text:c="2"/>"description": "Export analysis results as GeoJSON FeatureCollection",</text:p>
      <text:p text:style-name="P131"><text:s text:c="2"/>"parameters": {</text:p>
      <text:p text:style-name="P132"><text:s text:c="4"/>"features": {"type": "list", "description": "Spatial features to export"},</text:p>
      <text:p text:style-name="P133"><text:s text:c="4"/>"crs": {"type": "string", "description": "Coordinate reference system"}</text:p>
      <text:p text:style-name="P134"><text:s text:c="2"/>}</text:p>
      <text:p text:style-name="P135">}</text:p>
      <text:h text:style-name="Heading_20_3" text:outline-level="3"><text:bookmark-start text:name="a7-build_topology"/>A.7 build_topology<text:bookmark-end text:name="a7-build_topology"/></text:h>
      <text:p text:style-name="P136">{</text:p>
      <text:p text:style-name="P137"><text:s text:c="2"/>"name": "build_topology",</text:p>
      <text:p text:style-name="P138"><text:s text:c="2"/>"description": "Build topological graph from spatial context",</text:p>
      <text:p text:style-name="P139"><text:s text:c="2"/>"parameters": {</text:p>
      <text:p text:style-name="P140"><text:s text:c="4"/>"spatial_context": {"type": "SpatialContext", "description": "Perceived spatial data"}</text:p>
      <text:p text:style-name="P141"><text:s text:c="2"/>},</text:p>
      <text:p text:style-name="P142"><text:s text:c="2"/>"returns": {</text:p>
      <text:p text:style-name="P143"><text:s text:c="4"/>"topological_graph": "TopologicalGraph with nodes and relations"</text:p>
      <text:p text:style-name="P144"><text:s text:c="2"/>}</text:p>
      <text:p text:style-name="P145">}</text:p>
      <text:p text:style-name="Horizontal_20_Line"/>
      <text:h text:style-name="Heading_20_2" text:outline-level="2"><text:bookmark-start text:name="appendix-b-topological-node-and-relation-types"/>Appendix B: Topological Node and Relation Types<text:bookmark-end text:name="appendix-b-topological-node-and-relation-types"/></text:h>
      <text:p text:style-name="First_20_paragraph"><text:span text:style-name="T1">Table B.1.</text:span> Topological node types in UrbanAgent.</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Node Type</text:p>
            </table:table-cell>
            <table:table-cell table:style-name="TableHeaderRowCell" office:value-type="string">
              <text:p text:style-name="Table_20_Heading">Detection Method</text:p>
            </table:table-cell>
            <table:table-cell table:style-name="TableHeaderRowCell" office:value-type="string">
              <text:p text:style-name="Table_20_Heading">Urban Element</text:p>
            </table:table-cell>
          </table:table-row>
        </table:table-header-rows>
        <table:table-row>
          <table:table-cell table:style-name="TableRowCell" office:value-type="string">
            <text:p text:style-name="Table_20_Contents">Junction</text:p>
          </table:table-cell>
          <table:table-cell table:style-name="TableRowCell" office:value-type="string">
            <text:p text:style-name="Table_20_Contents">Road intersections with degree ≥ 3 in road graph</text:p>
          </table:table-cell>
          <table:table-cell table:style-name="TableRowCell" office:value-type="string">
            <text:p text:style-name="Table_20_Contents">Decision points, intersections</text:p>
          </table:table-cell>
        </table:table-row>
        <table:table-row>
          <table:table-cell table:style-name="TableRowCell" office:value-type="string">
            <text:p text:style-name="Table_20_Contents">Plaza</text:p>
          </table:table-cell>
          <table:table-cell table:style-name="TableRowCell" office:value-type="string">
            <text:p text:style-name="Table_20_Contents">Open spaces identified via building cluster analysis</text:p>
          </table:table-cell>
          <table:table-cell table:style-name="TableRowCell" office:value-type="string">
            <text:p text:style-name="Table_20_Contents">Public gathering spaces</text:p>
          </table:table-cell>
        </table:table-row>
        <table:table-row>
          <table:table-cell table:style-name="TableRowCell" office:value-type="string">
            <text:p text:style-name="Table_20_Contents">Cluster</text:p>
          </table:table-cell>
          <table:table-cell table:style-name="TableRowCell" office:value-type="string">
            <text:p text:style-name="Table_20_Contents">DBSCAN clustering (eps=50m, min_samples=3) of buildings</text:p>
          </table:table-cell>
          <table:table-cell table:style-name="TableRowCell" office:value-type="string">
            <text:p text:style-name="Table_20_Contents">Functional urban areas</text:p>
          </table:table-cell>
        </table:table-row>
        <table:table-row>
          <table:table-cell table:style-name="TableRowCell" office:value-type="string">
            <text:p text:style-name="Table_20_Contents">Landmark</text:p>
          </table:table-cell>
          <table:table-cell table:style-name="TableRowCell" office:value-type="string">
            <text:p text:style-name="Table_20_Contents">Prominence by name, height, or area outlier detection</text:p>
          </table:table-cell>
          <table:table-cell table:style-name="TableRowCell" office:value-type="string">
            <text:p text:style-name="Table_20_Contents">Wayfinding reference points</text:p>
          </table:table-cell>
        </table:table-row>
        <table:table-row>
          <table:table-cell table:style-name="TableRowCell" office:value-type="string">
            <text:p text:style-name="Table_20_Contents">Barrier</text:p>
          </table:table-cell>
          <table:table-cell table:style-name="TableRowCell" office:value-type="string">
            <text:p text:style-name="Table_20_Contents">Linear/areal features impeding movement</text:p>
          </table:table-cell>
          <table:table-cell table:style-name="TableRowCell" office:value-type="string">
            <text:p text:style-name="Table_20_Contents">Rivers, railways, highways</text:p>
          </table:table-cell>
        </table:table-row>
      </table:table>
      <text:p text:style-name="First_20_paragraph"><text:span text:style-name="T1">Table B.2.</text:span> Topological relation types in UrbanAgent.</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Relation Type</text:p>
            </table:table-cell>
            <table:table-cell table:style-name="TableHeaderRowCell" office:value-type="string">
              <text:p text:style-name="Table_20_Heading">Criterion</text:p>
            </table:table-cell>
            <table:table-cell table:style-name="TableHeaderRowCell" office:value-type="string">
              <text:p text:style-name="Table_20_Heading">Spatial Meaning</text:p>
            </table:table-cell>
          </table:table-row>
        </table:table-header-rows>
        <table:table-row>
          <table:table-cell table:style-name="TableRowCell" office:value-type="string">
            <text:p text:style-name="Table_20_Contents">Adjacent</text:p>
          </table:table-cell>
          <table:table-cell table:style-name="TableRowCell" office:value-type="string">
            <text:p text:style-name="Table_20_Contents">Distance &lt; 100m</text:p>
          </table:table-cell>
          <table:table-cell table:style-name="TableRowCell" office:value-type="string">
            <text:p text:style-name="Table_20_Contents">Directly neighboring</text:p>
          </table:table-cell>
        </table:table-row>
        <table:table-row>
          <table:table-cell table:style-name="TableRowCell" office:value-type="string">
            <text:p text:style-name="Table_20_Contents">Connected</text:p>
          </table:table-cell>
          <table:table-cell table:style-name="TableRowCell" office:value-type="string">
            <text:p text:style-name="Table_20_Contents">Distance &lt; 300m with road network path</text:p>
          </table:table-cell>
          <table:table-cell table:style-name="TableRowCell" office:value-type="string">
            <text:p text:style-name="Table_20_Contents">Reachable via walking</text:p>
          </table:table-cell>
        </table:table-row>
        <table:table-row>
          <table:table-cell table:style-name="TableRowCell" office:value-type="string">
            <text:p text:style-name="Table_20_Contents">Contains</text:p>
          </table:table-cell>
          <table:table-cell table:style-name="TableRowCell" office:value-type="string">
            <text:p text:style-name="Table_20_Contents">Spatial containment (geometry within geometry)</text:p>
          </table:table-cell>
          <table:table-cell table:style-name="TableRowCell" office:value-type="string">
            <text:p text:style-name="Table_20_Contents">Nested spatial hierarchy</text:p>
          </table:table-cell>
        </table:table-row>
        <table:table-row>
          <table:table-cell table:style-name="TableRowCell" office:value-type="string">
            <text:p text:style-name="Table_20_Contents">Aligned</text:p>
          </table:table-cell>
          <table:table-cell table:style-name="TableRowCell" office:value-type="string">
            <text:p text:style-name="Table_20_Contents">Shared linear morphological axis</text:p>
          </table:table-cell>
          <table:table-cell table:style-name="TableRowCell" office:value-type="string">
            <text:p text:style-name="Table_20_Contents">Part of an urban corridor</text:p>
          </table:table-cell>
        </table:table-row>
        <table:table-row>
          <table:table-cell table:style-name="TableRowCell" office:value-type="string">
            <text:p text:style-name="Table_20_Contents">Separated</text:p>
          </table:table-cell>
          <table:table-cell table:style-name="TableRowCell" office:value-type="string">
            <text:p text:style-name="Table_20_Contents">Barrier element between nodes</text:p>
          </table:table-cell>
          <table:table-cell table:style-name="TableRowCell" office:value-type="string">
            <text:p text:style-name="Table_20_Contents">Disconnected by obstac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meta:generator>
    <dc:title/>
    <dc:description/>
    <dc:subject/>
    <meta:keyword/>
    <meta:initial-creator/>
    <dc:creator/>
    <meta:creation-date>2026-03-07T09:10:27Z</meta:creation-date>
    <dc:date>2026-03-07T09:10:27Z</dc:date>
  </office:meta>
</office:document-meta>
</file>